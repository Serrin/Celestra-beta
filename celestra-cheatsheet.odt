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67in" table:align="center" fo:background-color="transparent">
        <style:background-image/>
      </style:table-properties>
    </style:style>
    <style:style style:name="Table4.A" style:family="table-column">
      <style:table-column-properties style:column-width="3.8583in"/>
    </style:style>
    <style:style style:name="Table4.B" style:family="table-column">
      <style:table-column-properties style:column-width="3.2583in"/>
    </style:style>
    <style:style style:name="Table4.C" style:family="table-column">
      <style:table-column-properties style:column-width="3.2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7in" style:rel-column-width="32736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2in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0" style:family="paragraph" style:parent-style-name="Table_20_Contents">
      <style:text-properties officeooo:paragraph-rsid="0108f4cf"/>
    </style:style>
    <style:style style:name="P51" style:family="paragraph" style:parent-style-name="Table_20_Contents">
      <style:text-properties officeooo:paragraph-rsid="05d57337"/>
    </style:style>
    <style:style style:name="P52" style:family="paragraph" style:parent-style-name="Table_20_Contents">
      <style:text-properties officeooo:paragraph-rsid="0294e861"/>
    </style:style>
    <style:style style:name="P53" style:family="paragraph" style:parent-style-name="Text_20_body">
      <style:paragraph-properties fo:margin-top="0in" fo:margin-bottom="0in" style:contextual-spacing="false" fo:line-height="100%"/>
      <style:text-properties officeooo:paragraph-rsid="033021f0"/>
    </style:style>
    <style:style style:name="P54" style:family="paragraph" style:parent-style-name="Table_20_Contents">
      <style:text-properties officeooo:paragraph-rsid="06d62cf8"/>
    </style:style>
    <style:style style:name="P55" style:family="paragraph" style:parent-style-name="Table_20_Contents">
      <style:paragraph-properties fo:margin-top="0in" fo:margin-bottom="0in" style:contextual-spacing="false" fo:line-height="100%"/>
      <style:text-properties style:font-name="Courier New" fo:font-size="10pt" officeooo:paragraph-rsid="06d62cf8" style:font-size-asian="10pt" style:font-size-complex="10pt"/>
    </style:style>
    <style:style style:name="P56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7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8" style:family="paragraph" style:parent-style-name="Text_20_body">
      <style:paragraph-properties fo:margin-top="0in" fo:margin-bottom="0in" style:contextual-spacing="false" fo:line-height="100%"/>
      <style:text-properties officeooo:paragraph-rsid="06d62cf8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in" fo:margin-bottom="0in" style:contextual-spacing="false" fo:line-height="100%"/>
      <style:text-properties officeooo:paragraph-rsid="06d14bf1"/>
    </style:style>
    <style:style style:name="P61" style:family="paragraph" style:parent-style-name="Table_20_Contents">
      <style:text-properties officeooo:paragraph-rsid="06d35d88"/>
    </style:style>
    <style:style style:name="P62" style:family="paragraph" style:parent-style-name="Table_20_Contents">
      <style:paragraph-properties fo:margin-top="0in" fo:margin-bottom="0in" style:contextual-spacing="false" fo:line-height="100%"/>
      <style:text-properties officeooo:paragraph-rsid="06d35d88"/>
    </style:style>
    <style:style style:name="P63" style:family="paragraph" style:parent-style-name="Text_20_body">
      <style:paragraph-properties fo:margin-top="0in" fo:margin-bottom="0in" style:contextual-spacing="false" fo:line-height="100%"/>
      <style:text-properties officeooo:paragraph-rsid="02b867ce"/>
    </style:style>
    <style:style style:name="P64" style:family="paragraph" style:parent-style-name="Text_20_body">
      <style:paragraph-properties fo:margin-top="0in" fo:margin-bottom="0in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officeooo:paragraph-rsid="06b62d88"/>
    </style:style>
    <style:style style:name="P66" style:family="paragraph" style:parent-style-name="Table_20_Contents">
      <style:text-properties officeooo:paragraph-rsid="06b8aecb"/>
    </style:style>
    <style:style style:name="P67" style:family="paragraph" style:parent-style-name="Table_20_Contents">
      <style:text-properties officeooo:paragraph-rsid="06615518"/>
    </style:style>
    <style:style style:name="P68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3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4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5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6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7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2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0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b2c9b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c5ef7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style:font-name-complex="Courier New"/>
    </style:style>
    <style:style style:name="T5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officeooo:rsid="0277dedb"/>
    </style:style>
    <style:style style:name="T8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style:font-name="Courier New" officeooo:rsid="052883ca"/>
    </style:style>
    <style:style style:name="T88" style:family="text">
      <style:text-properties style:font-name="Courier New" officeooo:rsid="04dc5c57"/>
    </style:style>
    <style:style style:name="T8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0" style:family="text">
      <style:text-properties style:font-name="Courier New" officeooo:rsid="06717cff"/>
    </style:style>
    <style:style style:name="T91" style:family="text">
      <style:text-properties officeooo:rsid="023d069c"/>
    </style:style>
    <style:style style:name="T92" style:family="text">
      <style:text-properties officeooo:rsid="021570c6"/>
    </style:style>
    <style:style style:name="T93" style:family="text">
      <style:text-properties officeooo:rsid="02984091"/>
    </style:style>
    <style:style style:name="T94" style:family="text">
      <style:text-properties officeooo:rsid="0298730b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1" style:family="text">
      <style:text-properties fo:font-style="normal" officeooo:rsid="023ec219" style:font-style-asian="normal" style:font-style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13f657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fo:font-style="normal" officeooo:rsid="0465e86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3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officeooo:rsid="02b867ce"/>
    </style:style>
    <style:style style:name="T14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fo:font-style="normal" officeooo:rsid="065c244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32f82a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45b99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45d117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italic" officeooo:rsid="06b8aec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91" style:family="text">
      <style:text-properties fo:color="#000000" loext:opacity="100%" style:font-name="Courier New" fo:font-size="10pt" fo:language="zxx" fo:country="none" officeooo:rsid="06b8aecb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9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9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97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198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19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2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4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5" style:family="text">
      <style:text-properties officeooo:rsid="04144748"/>
    </style:style>
    <style:style style:name="T206" style:family="text">
      <style:text-properties officeooo:rsid="0478c748"/>
    </style:style>
    <style:style style:name="T207" style:family="text">
      <style:text-properties fo:font-style="italic" officeooo:rsid="040de640" style:font-style-asian="italic" style:font-style-complex="italic"/>
    </style:style>
    <style:style style:name="T208" style:family="text">
      <style:text-properties fo:font-style="italic" officeooo:rsid="0478c748" style:font-style-asian="italic" style:font-style-complex="italic"/>
    </style:style>
    <style:style style:name="T209" style:family="text">
      <style:text-properties fo:font-style="italic" officeooo:rsid="04125c48" style:font-style-asian="italic" style:font-style-complex="italic"/>
    </style:style>
    <style:style style:name="T210" style:family="text">
      <style:text-properties officeooo:rsid="042d7d17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officeooo:rsid="051a58c7"/>
    </style:style>
    <style:style style:name="T213" style:family="text">
      <style:text-properties officeooo:rsid="0424aa9b"/>
    </style:style>
    <style:style style:name="T214" style:family="text">
      <style:text-properties style:font-name="Courier New" fo:font-size="10pt" officeooo:rsid="040de640" style:font-size-asian="10pt" style:font-size-complex="10pt"/>
    </style:style>
    <style:style style:name="T215" style:family="text">
      <style:text-properties style:font-name="Courier New" fo:font-size="10pt" officeooo:rsid="051a58c7" style:font-size-asian="10pt" style:font-size-complex="10pt"/>
    </style:style>
    <style:style style:name="T216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17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18" style:family="text">
      <style:text-properties officeooo:rsid="048a07de"/>
    </style:style>
    <style:style style:name="T219" style:family="text">
      <style:text-properties style:font-name="Courier New" officeooo:rsid="040de640"/>
    </style:style>
    <style:style style:name="T220" style:family="text">
      <style:text-properties officeooo:rsid="04546f38"/>
    </style:style>
    <style:style style:name="T22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2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3" style:family="text">
      <style:text-properties fo:language="zxx" fo:country="none" style:language-asian="zxx" style:country-asian="none" style:language-complex="zxx" style:country-complex="none"/>
    </style:style>
    <style:style style:name="T224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5" style:family="text">
      <style:text-properties officeooo:rsid="03f9c86c"/>
    </style:style>
    <style:style style:name="T226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4">0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41">deepAssign</text:span></text:span><text:span text:style-name="Source_20_Text"><text:span text:style-name="T10">(target,source1[,s</text:span></text:span><text:span text:style-name="Source_20_Text"><text:span text:style-name="T42">ou</text:span></text:span><text:span text:style-name="Source_20_Text"><text:span text:style-name="T10">rc</text:span></text:span><text:span text:style-name="Source_20_Text"><text:span text:style-name="T42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3">bje</text:span></text:span><text:span text:style-name="Source_20_Text"><text:span text:style-name="T44">ct</text:span></text:span><text:span text:style-name="Source_20_Text"><text:span text:style-name="T10">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5">omit</text:span></text:span><text:span text:style-name="Source_20_Text"><text:span text:style-name="T10">(object,keys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39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6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7">r</text:span></text:span><text:span text:style-name="Source_20_Text"><text:span text:style-name="T12">andomUUIDv7</text:span></text:span><text:span text:style-name="Source_20_Text"><text:span text:style-name="T48">(</text:span></text:span><text:span text:style-name="Source_20_Text"><text:span text:style-name="T49">v4=false</text:span></text:span><text:span text:style-name="Source_20_Text"><text:span text:style-name="T48">);</text:span></text:span></text:p>
            <text:p text:style-name="P16"><text:span text:style-name="Source_20_Text"><text:span text:style-name="T50"/></text:span></text:p>
            <text:p text:style-name="P16"><text:span text:style-name="Source_20_Text"><text:span text:style-name="T50">nanoid([size=21[,alphabet="ABCDEFGHIJKLMNOPQRSTUVWXYZabcdefghijklmnopqrstuvwxyz0123456789_-"]]);</text:span></text:span></text:p>
            <text:p text:style-name="P16"><text:span text:style-name="Source_20_Text"><text:span text:style-name="T50"/></text:span></text:p>
            <text:p text:style-name="P20"><text:span text:style-name="Source_20_Text"><text:span text:style-name="T51">timestampID([size=21[,alphabet=</text:span></text:span><text:span text:style-name="Source_20_Text"><text:span text:style-name="T52">"</text:span></text:span><text:span text:style-name="Source_20_Text"><text:span text:style-name="T31">23456789CFGHJMPQRVWXcfghjmpqvwx</text:span></text:span><text:span text:style-name="Source_20_Text"><text:span text:style-name="T52">"</text:span></text:span><text:span text:style-name="Source_20_Text"><text:span text:style-name="T51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50"/></text:span></text:p>
            <text:p text:style-name="P22"><text:span text:style-name="Source_20_Text"><text:span text:style-name="T53">assert(condition[,message</text:span></text:span><text:span text:style-name="Source_20_Text"><text:span text:style-name="T54">|error</text:span></text:span><text:span text:style-name="Source_20_Text"><text:span text:style-name="T53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5">Polyfills</text:span></text:span></text:p>
          </table:table-cell>
          <table:table-cell table:style-name="Table5.A1" office:value-type="string">
            <text:p text:style-name="P25"><text:span text:style-name="Source_20_Text"><text:span text:style-name="T56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6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7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8">crypto.randomUUID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9">Error.isError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0">globalThis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0">Math.sumPrecise();</text:span></text:span></text:a></text:p>
            <text:p text:style-name="P29"><text:span text:style-name="Source_20_Text"><text:span text:style-name="T58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1">globalThis.AsyncFunction();</text:span></text:span></text:a></text:p>
            <text:p text:style-name="P28"><text:span text:style-name="Source_20_Text"><text:span text:style-name="T61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2">global</text:span></text:span><text:span text:style-name="Source_20_Text"><text:span text:style-name="T63">this</text:span></text:span><text:span text:style-name="Source_20_Text"><text:span text:style-name="T61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4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10"/></text:span></text:p>
            <text:p text:style-name="P31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5">ng</text:span></text:span><text:span text:style-name="Source_20_Text"><text:span text:style-name="T10">);</text:span></text:span></text:p>
            <text:p text:style-name="P31"><text:span text:style-name="Source_20_Text"><text:span text:style-name="T10">b64Encode(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dePoints(s</text:span></text:span><text:span text:style-name="Source_20_Text"><text:span text:style-name="T66">t</text:span></text:span><text:span text:style-name="Source_20_Text"><text:span text:style-name="T53">ring</text:span></text:span><text:span text:style-name="Source_20_Text"><text:span text:style-name="T10">);</text:span></text:span></text:p>
            <text:p text:style-name="P31"><text:span text:style-name="Source_20_Text"><text:span text:style-name="T10">strFromCodePoints(i</text:span></text:span><text:span text:style-name="Source_20_Text"><text:span text:style-name="T67">terator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At(s</text:span></text:span><text:span text:style-name="Source_20_Text"><text:span text:style-name="T68">tri</text:span></text:span><text:span text:style-name="Source_20_Text"><text:span text:style-name="T69">ng</text:span></text:span><text:span text:style-name="Source_20_Text"><text:span text:style-name="T10">,index[,newChar]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unt</text:span></text:span><text:span text:style-name="Source_20_Text"><text:span text:style-name="T70">(string, sub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Splice(</text:span></text:span><text:span text:style-name="Source_20_Text"><text:span text:style-name="T71">str</text:span></text:span><text:span text:style-name="Source_20_Text"><text:span text:style-name="T10">,index,count[,add</text:span></text:span><text:span text:style-name="Source_20_Text"><text:span text:style-name="T72">]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73">strTruncate(st</text:span></text:span><text:span text:style-name="Source_20_Text"><text:span text:style-name="T53">ring</text:span></text:span><text:span text:style-name="Source_20_Text"><text:span text:style-name="T73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Reverse(s</text:span></text:span><text:span text:style-name="Source_20_Text"><text:span text:style-name="T74">t</text:span></text:span><text:span text:style-name="Source_20_Text"><text:span text:style-name="T75">ring</text:span></text:span><text:span text:style-name="Source_20_Text"><text:span text:style-name="T10">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10">strUpFirst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DownFirst(s</text:span></text:span><text:span text:style-name="Source_20_Text"><text:span text:style-name="T77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1"><text:span text:style-name="Source_20_Text"><text:span text:style-name="T10">strCapitaliz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Proper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79">s</text:span></text:span><text:span text:style-name="Source_20_Text"><text:span text:style-name="T10">tr</text:span></text:span><text:span text:style-name="Source_20_Text"><text:span text:style-name="T80">T</text:span></text:span><text:span text:style-name="Source_20_Text"><text:span text:style-name="T81">itle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HTML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</text:span></text:span><text:span text:style-name="Source_20_Text"><text:span text:style-name="T82">HTML</text:span></text:span><text:span text:style-name="Source_20_Text"><text:span text:style-name="T10">RemoveTags(string);</text:span></text:span></text:p>
            <text:p text:style-name="P31"><text:span text:style-name="Source_20_Text"><text:span text:style-name="T10">strHTML</text:span></text:span><text:span text:style-name="Source_20_Text"><text:span text:style-name="T83">Un</text:span></text:span><text:span text:style-name="Source_20_Text"><text:span text:style-name="T10">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2"><text:span text:style-name="Source_20_Text"><text:span text:style-name="T53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4">minmax</text:span>(value,min,max);</text:p>
            <text:p text:style-name="P34"><text:span text:style-name="Source_20_Text"><text:span text:style-name="T10">inRange(value,min,max);</text:span></text:span></text:p>
            <text:p text:style-name="P34"><text:span text:style-name="Source_20_Text"><text:span text:style-name="T85"/></text:span></text:p>
            <text:p text:style-name="P34"><text:span text:style-name="Source_20_Text"><text:span text:style-name="T85">signbit(value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Int([max]);</text:span></text:span></text:p>
            <text:p text:style-name="P34"><text:span text:style-name="Source_20_Text"><text:span text:style-name="T10">randomInt(min,max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Float([max]);</text:span></text:span></text:p>
            <text:p text:style-name="P34"><text:span text:style-name="Source_20_Text"><text:span text:style-name="T86">randomFloat(min,max);</text:span></text:span></text:p>
            <text:p text:style-name="P34"><text:span text:style-name="Source_20_Text"><text:span text:style-name="T86"/></text:span></text:p>
            <text:p text:style-name="P35">add(value1,value2);</text:p>
            <text:p text:style-name="P36"><text:span text:style-name="Source_20_Text"><text:span text:style-name="T87">sub</text:span></text:span><text:span text:style-name="Source_20_Text"><text:span text:style-name="T88">(value1,value2);</text:span></text:span></text:p>
            <text:p text:style-name="P36"><text:span text:style-name="Source_20_Text"><text:span text:style-name="T87">mul</text:span></text:span><text:span text:style-name="Source_20_Text"><text:span text:style-name="T88">(value1,value2);</text:span></text:span></text:p>
            <text:p text:style-name="P36"><text:span text:style-name="Source_20_Text"><text:span text:style-name="T87">div</text:span></text:span><text:span text:style-name="Source_20_Text"><text:span text:style-name="T88">(value1,value2);</text:span></text:span></text:p>
            <text:p text:style-name="P36"><text:span text:style-name="Source_20_Text"><text:span text:style-name="T89"/></text:span></text:p>
            <text:p text:style-name="P36"><text:span text:style-name="Source_20_Text"><text:span text:style-name="T88">divMo</text:span></text:span><text:span text:style-name="Source_20_Text"><text:span text:style-name="T87">d</text:span></text:span><text:span text:style-name="Source_20_Text"><text:span text:style-name="T88">(value1,value2);</text:span></text:span></text:p>
            <text:p text:style-name="P36"><text:span text:style-name="Source_20_Text"><text:span text:style-name="T87">mod</text:span></text:span><text:span text:style-name="Source_20_Text"><text:span text:style-name="T88">(value1,value2);</text:span></text:span></text:p>
            <text:p text:style-name="P37"><text:span text:style-name="Source_20_Text"><text:span text:style-name="T90"/></text:span></text:p>
            <text:p text:style-name="P37"><text:span text:style-name="Source_20_Text"><text:span text:style-name="T90">pow(base, power);</text:span></text:span></text:p>
            <text:p text:style-name="P36"><text:span text:style-name="Source_20_Text"><text:span text:style-name="T86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1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2">i</text:span><text:span text:style-name="T93">s</text:span>BigUInt64(value);</text:p>
            <text:p text:style-name="P41"><text:span text:style-name="T93">is</text:span>Float<text:span text:style-name="T94">16</text:span>(value);</text:p>
            <text:p text:style-name="P42"><text:span text:style-name="Source_20_Text"><text:span text:style-name="T85">isFloa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85">);</text:span></text:span></text:p>
            <text:p text:style-name="P42"><text:span text:style-name="Source_20_Text"><text:span text:style-name="T85"/></text:span></text:p>
            <text:p text:style-name="P42"><text:span text:style-name="Source_20_Text"><text:span text:style-name="T97">toInteger(valu</text:span></text:span><text:span text:style-name="Source_20_Text"><text:span text:style-name="T98">e</text:span></text:span><text:span text:style-name="Source_20_Text"><text:span text:style-name="T97">);</text:span></text:span></text:p>
            <text:p text:style-name="P43"><text:span text:style-name="Source_20_Text"><text:span text:style-name="T99">toIntegerOrInfinity(</text:span></text:span><text:span text:style-name="Source_20_Text"><text:span text:style-name="T100">val</text:span></text:span><text:span text:style-name="Source_20_Text"><text:span text:style-name="T99">);</text:span></text:span></text:p>
            <text:p text:style-name="P38"><text:span text:style-name="T101">t</text:span><text:span text:style-name="T102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3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3">toFloat</text:span><text:span text:style-name="T93">16</text:span><text:span text:style-name="T103">(value);</text:span></text:p>
            <text:p text:style-name="P39"><text:span text:style-name="Source_20_Text"><text:span text:style-name="T56">toFloat32(value);</text:span></text:span></text:p>
            <text:p text:style-name="P39"><text:span text:style-name="Source_20_Text"><text:span text:style-name="T104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5">Cookie </text:span></text:span><text:span text:style-name="Source_20_Text"><text:span text:style-name="T106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10">getCookie([name]);</text:span></text:span></text:p>
            <text:p text:style-name="P34"><text:span text:style-name="Source_20_Text"><text:span text:style-name="T11">h</text:span></text:span><text:span text:style-name="Source_20_Text"><text:span text:style-name="T10">asCookie(name);</text:span></text:span></text:p>
            <text:p text:style-name="P34"><text:span text:style-name="Source_20_Text"><text:span text:style-name="T10">setCookie(name,value[,hours</text:span></text:span><text:span text:style-name="Source_20_Text"><text:span text:style-name="T86">=8760</text:span></text:span><text:span text:style-name="Source_20_Text"><text:span text:style-name="T10">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]);</text:span></text:span></text:p>
            <text:p text:style-name="P34"><text:span text:style-name="Source_20_Text"><text:span text:style-name="T10">set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10">removeCookie(name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);</text:span></text:span></text:p>
            <text:p text:style-name="P34"><text:span text:style-name="Source_20_Text"><text:span text:style-name="T10">remove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53">clearCookies([path</text:span></text:span><text:span text:style-name="Source_20_Text"><text:span text:style-name="T86">="/"</text:span></text:span><text:span text:style-name="Source_20_Text"><text:span text:style-name="T53">[,domain[,</text:span></text:span><text:span text:style-name="Source_20_Text"><text:span text:style-name="T110">sec</text:span></text:span><text:span text:style-name="Source_20_Text"><text:span text:style-name="T53">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53">[,HttpOnly]]]]]);</text:span></text:span></text:p>
            <text:p text:style-name="P34"><text:span text:style-name="Source_20_Text"><text:span text:style-name="T53">clearCookies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1">Collections </text:span></text:span><text:span text:style-name="Source_20_Text"><text:span text:style-name="T112">API</text:span></text:span></text:p>
          </table:table-cell>
          <table:covered-table-cell/>
          <table:table-cell table:style-name="Table4.C1" office:value-type="string">
            <text:p text:style-name="P47">Type API</text:p>
          </table:table-cell>
        </table:table-row>
        <table:table-row>
          <table:table-cell table:style-name="Table4.A2" office:value-type="string">
            <text:p text:style-name="P48"><text:span text:style-name="Source_20_Text"><text:span text:style-name="T113"/></text:span></text:p>
            <text:p text:style-name="P48"><text:span text:style-name="Source_20_Text"><text:span text:style-name="T113">castArray</text:span></text:span><text:span text:style-name="Source_20_Text"><text:span text:style-name="T114">(value);</text:span></text:span></text:p>
            <text:p text:style-name="P48"><text:span text:style-name="Source_20_Text"><text:span text:style-name="T60">arrayDeepClone(array);</text:span></text:span></text:p>
            <text:p text:style-name="P48"><text:span text:style-name="Source_20_Text"><text:span text:style-name="T60">arrayMerge(target,so</text:span></text:span><text:span text:style-name="Source_20_Text"><text:span text:style-name="T115">ur</text:span></text:span><text:span text:style-name="Source_20_Text"><text:span text:style-name="T116">c</text:span></text:span><text:span text:style-name="Source_20_Text"><text:span text:style-name="T60">e</text:span></text:span><text:span text:style-name="Source_20_Text"><text:span text:style-name="T115">1</text:span></text:span><text:span text:style-name="Source_20_Text"><text:span text:style-name="T60">[,</text:span></text:span><text:span text:style-name="Source_20_Text"><text:span text:style-name="T116">s</text:span></text:span><text:span text:style-name="Source_20_Text"><text:span text:style-name="T115">ou</text:span></text:span><text:span text:style-name="Source_20_Text"><text:span text:style-name="T116">r</text:span></text:span><text:span text:style-name="Source_20_Text"><text:span text:style-name="T115">ce</text:span></text:span><text:span text:style-name="Source_20_Text"><text:span text:style-name="T60">N]);</text:span></text:span></text:p>
            <text:p text:style-name="P48"><text:span text:style-name="Source_20_Text"><text:span text:style-name="T117">arrayAdd</text:span></text:span><text:span text:style-name="Source_20_Text"><text:span text:style-name="T60">(array,value);</text:span></text:span></text:p>
            <text:p text:style-name="P48"><text:span text:style-name="Source_20_Text"><text:span text:style-name="T60">arrayClear(array); </text:span></text:span></text:p>
            <text:p text:style-name="P48"><text:span text:style-name="Source_20_Text"><text:span text:style-name="T118">arrayRemove(array,value[,all </text:span></text:span><text:span text:style-name="Source_20_Text"><text:span text:style-name="T119">= false</text:span></text:span><text:span text:style-name="Source_20_Text"><text:span text:style-name="T118">]);</text:span></text:span></text:p>
            <text:p text:style-name="P48"><text:span text:style-name="Source_20_Text"><text:span text:style-name="T118">arrayRemove</text:span></text:span><text:span text:style-name="Source_20_Text"><text:span text:style-name="T120">By</text:span></text:span><text:span text:style-name="Source_20_Text"><text:span text:style-name="T118">(array,c</text:span></text:span><text:span text:style-name="Source_20_Text"><text:span text:style-name="T120">allback</text:span></text:span><text:span text:style-name="Source_20_Text"><text:span text:style-name="T118">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9"><text:span text:style-name="Source_20_Text"><text:span text:style-name="T114"/></text:span></text:p>
            <text:p text:style-name="P50"><text:span text:style-name="Source_20_Text"><text:span text:style-name="T121">arrayRange([start=0[,end = </text:span></text:span><text:span text:style-name="Source_20_Text"><text:span text:style-name="T122">99</text:span></text:span><text:span text:style-name="Source_20_Text"><text:span text:style-name="T121">[,step = 1]]]);</text:span></text:span></text:p>
            <text:p text:style-name="P51"><text:span text:style-name="Source_20_Text"><text:span text:style-name="T58">arrayCycle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24">= 100</text:span></text:span><text:span text:style-name="Source_20_Text"><text:span text:style-name="T58">]);</text:span></text:span></text:p>
            <text:p text:style-name="P51"><text:span text:style-name="Source_20_Text"><text:span text:style-name="T125">arrayRepeat(value[,n </text:span></text:span><text:span text:style-name="Source_20_Text"><text:span text:style-name="T126">= 100</text:span></text:span><text:span text:style-name="Source_20_Text"><text:span text:style-name="T125">]);</text:span></text:span></text:p>
            <text:p text:style-name="P51"><text:span text:style-name="Source_20_Text"><text:span text:style-name="T125"/></text:span></text:p>
            <text:p text:style-name="P52"><text:span text:style-name="Source_20_Text"><text:span text:style-name="T127">iterRange([start=0[,step=1[,end=Infinity]]]);</text:span></text:span></text:p>
            <text:p text:style-name="P52"><text:span text:style-name="Source_20_Text"><text:span text:style-name="T127">iterCycle(iter</text:span></text:span><text:span text:style-name="Source_20_Text"><text:span text:style-name="T128">ator</text:span></text:span><text:span text:style-name="Source_20_Text"><text:span text:style-name="T127">[,n </text:span></text:span><text:span text:style-name="Source_20_Text"><text:span text:style-name="T129">= Infinity</text:span></text:span><text:span text:style-name="Source_20_Text"><text:span text:style-name="T127">]);</text:span></text:span></text:p>
            <text:p text:style-name="P52"><text:span text:style-name="Source_20_Text"><text:span text:style-name="T58">iterRepeat(value[,n </text:span></text:span><text:span text:style-name="Source_20_Text"><text:span text:style-name="T129">= Infinity</text:span></text:span><text:span text:style-name="Source_20_Text"><text:span text:style-name="T58">]);</text:span></text:span></text:p>
            <text:p text:style-name="P53"><text:span text:style-name="Source_20_Text"><text:span text:style-name="T130"/></text:span></text:p>
            <text:p text:style-name="P54"><text:span text:style-name="Source_20_Text"><text:span text:style-name="T58">min(v</text:span></text:span><text:span text:style-name="Source_20_Text"><text:span text:style-name="T131">alue1[,valueN]</text:span></text:span><text:span text:style-name="Source_20_Text"><text:span text:style-name="T58">);</text:span></text:span></text:p>
            <text:p text:style-name="P55"><text:span text:style-name="Source_20_Text"><text:span text:style-name="T132">max(v</text:span></text:span><text:span text:style-name="Source_20_Text"><text:span text:style-name="T133">alue1[,valueN]</text:span></text:span><text:span text:style-name="Source_20_Text"><text:span text:style-name="T132">);</text:span></text:span></text:p>
            <text:p text:style-name="P53"><text:span text:style-name="Source_20_Text"><text:span text:style-name="T130"/></text:span></text:p>
            <text:p text:style-name="P56"><text:span text:style-name="Source_20_Text"><text:span text:style-name="T134">count</text:span></text:span><text:span text:style-name="Source_20_Text"><text:span text:style-name="T135">(i</text:span></text:span><text:span text:style-name="Source_20_Text"><text:span text:style-name="T123">terator</text:span></text:span><text:span text:style-name="Source_20_Text"><text:span text:style-name="T135">,callback);</text:span></text:span></text:p>
            <text:p text:style-name="P53"><text:span text:style-name="Source_20_Text"><text:span text:style-name="T130"/></text:span></text:p>
            <text:p text:style-name="P57"><text:span text:style-name="Source_20_Text"><text:span text:style-name="T114">compact</text:span></text:span><text:span text:style-name="Source_20_Text"><text:span text:style-name="T113">(</text:span></text:span><text:span text:style-name="Source_20_Text"><text:span text:style-name="T136">collection</text:span></text:span><text:span text:style-name="Source_20_Text"><text:span text:style-name="T113">);</text:span></text:span></text:p>
            <text:p text:style-name="P57"><text:span text:style-name="Source_20_Text"><text:span text:style-name="T113"/></text:span></text:p>
            <text:p text:style-name="P58"><text:span text:style-name="Source_20_Text"><text:span text:style-name="T137">findLast(i</text:span></text:span><text:span text:style-name="Source_20_Text"><text:span text:style-name="T138">terator</text:span></text:span><text:span text:style-name="Source_20_Text"><text:span text:style-name="T137">,callback);</text:span></text:span></text:p>
            <text:p text:style-name="P53"><text:span text:style-name="Source_20_Text"><text:span text:style-name="T127"/></text:span></text:p>
            <text:p text:style-name="P54"><text:span text:style-name="Source_20_Text"><text:span text:style-name="T58">item(i</text:span></text:span><text:span text:style-name="Source_20_Text"><text:span text:style-name="T123">terator</text:span></text:span><text:span text:style-name="Source_20_Text"><text:span text:style-name="T58">,index);</text:span></text:span></text:p>
            <text:p text:style-name="P54"><text:span text:style-name="Source_20_Text"><text:span text:style-name="T139">nth(i</text:span></text:span><text:span text:style-name="Source_20_Text"><text:span text:style-name="T123">terator</text:span></text:span><text:span text:style-name="Source_20_Text"><text:span text:style-name="T139">,index);</text:span></text:span></text:p>
            <text:p text:style-name="P59"><text:span text:style-name="Source_20_Text"><text:span text:style-name="T140"/></text:span></text:p>
            <text:p text:style-name="P58"><text:span text:style-name="Source_20_Text"><text:span text:style-name="T58">first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8"><text:span text:style-name="Source_20_Text"><text:span text:style-name="T141">head(i</text:span></text:span><text:span text:style-name="Source_20_Text"><text:span text:style-name="T138">terator</text:span></text:span><text:span text:style-name="Source_20_Text"><text:span text:style-name="T141">);</text:span></text:span></text:p>
            <text:p text:style-name="P58"><text:span text:style-name="Source_20_Text"><text:span text:style-name="T141"/></text:span></text:p>
            <text:p text:style-name="P58"><text:span text:style-name="Source_20_Text"><text:span text:style-name="T127">last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60"><text:span text:style-name="Source_20_Text"><text:span text:style-name="T121"/></text:span></text:p>
            <text:p text:style-name="P61"><text:span text:style-name="Source_20_Text"><text:span text:style-name="T58">zip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62"><text:span text:style-name="Source_20_Text"><text:span text:style-name="T142">unzip(i</text:span></text:span><text:span text:style-name="Source_20_Text"><text:span text:style-name="T138">terator</text:span></text:span><text:span text:style-name="Source_20_Text"><text:span text:style-name="T142">);</text:span></text:span></text:p>
            <text:p text:style-name="P62"><text:span text:style-name="Source_20_Text"><text:span text:style-name="T142">zipObj(i</text:span></text:span><text:span text:style-name="Source_20_Text"><text:span text:style-name="T138">terator1</text:span></text:span><text:span text:style-name="Source_20_Text"><text:span text:style-name="T142">,i</text:span></text:span><text:span text:style-name="Source_20_Text"><text:span text:style-name="T138">terator</text:span></text:span><text:span text:style-name="Source_20_Text"><text:span text:style-name="T143">2</text:span></text:span><text:span text:style-name="Source_20_Text"><text:span text:style-name="T142">);</text:span></text:span></text:p>
          </table:table-cell>
          <table:table-cell table:style-name="Table4.B2" office:value-type="string">
            <text:p text:style-name="P63"><text:span text:style-name="Source_20_Text"><text:span text:style-name="T142"/></text:span></text:p>
            <text:p text:style-name="P63"><text:span text:style-name="Source_20_Text"><text:span text:style-name="T144">shuffle(i</text:span></text:span><text:span text:style-name="Source_20_Text"><text:span text:style-name="T123">terator</text:span></text:span><text:span text:style-name="Source_20_Text"><text:span text:style-name="T144">);</text:span></text:span></text:p>
            <text:p text:style-name="P63"><text:span text:style-name="Source_20_Text"><text:span text:style-name="T145"/></text:span></text:p>
            <text:p text:style-name="P63"><text:span text:style-name="Source_20_Text"><text:span text:style-name="T145">sort(i</text:span></text:span><text:span text:style-name="Source_20_Text"><text:span text:style-name="T123">terator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 = 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63"><text:span text:style-name="Source_20_Text"><text:span text:style-name="T144"/></text:span></text:p>
            <text:p text:style-name="P63"><text:span text:style-name="Source_20_Text"><text:span text:style-name="T144">reverse(i</text:span></text:span><text:span text:style-name="Source_20_Text"><text:span text:style-name="T123">terator</text:span></text:span><text:span text:style-name="Source_20_Text"><text:span text:style-name="T144">);</text:span></text:span></text:p>
            <text:p text:style-name="P59"><text:span text:style-name="Source_20_Text"><text:span text:style-name="T60"/></text:span></text:p>
            <text:p text:style-name="P64">initial(i<text:span text:style-name="Source_20_Text"><text:span text:style-name="T148">terator</text:span></text:span>);</text:p>
            <text:p text:style-name="P63"><text:span text:style-name="Source_20_Text"><text:span text:style-name="T58"/></text:span></text:p>
            <text:p text:style-name="P63"><text:span text:style-name="Source_20_Text"><text:span text:style-name="T58">tail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63"><text:span text:style-name="Source_20_Text"><text:span text:style-name="T149"/></text:span></text:p>
            <text:p text:style-name="P63"><text:span text:style-name="Source_20_Text"><text:span text:style-name="T58">concat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63"><text:span text:style-name="Source_20_Text"><text:span text:style-name="T58"/></text:span></text:p>
            <text:p text:style-name="P63"><text:span text:style-name="Source_20_Text"><text:span text:style-name="T127">join(i</text:span></text:span><text:span text:style-name="Source_20_Text"><text:span text:style-name="T123">terator</text:span></text:span><text:span text:style-name="Source_20_Text"><text:span text:style-name="T127">[,separator </text:span></text:span><text:span text:style-name="Source_20_Text"><text:span text:style-name="T150">= ","</text:span></text:span><text:span text:style-name="Source_20_Text"><text:span text:style-name="T127">]);</text:span></text:span></text:p>
            <text:p text:style-name="P63"><text:span text:style-name="Source_20_Text"><text:span text:style-name="T127"/></text:span></text:p>
            <text:p text:style-name="P58"><text:span text:style-name="Source_20_Text"><text:span text:style-name="T127">enumerate(i</text:span></text:span><text:span text:style-name="Source_20_Text"><text:span text:style-name="T123">terator</text:span></text:span><text:span text:style-name="Source_20_Text"><text:span text:style-name="T127">[,offset = 0]);</text:span></text:span></text:p>
            <text:p text:style-name="P58"><text:span text:style-name="Source_20_Text"><text:span text:style-name="T127"/></text:span></text:p>
            <text:p text:style-name="P58"><text:span text:style-name="Source_20_Text"><text:span text:style-name="T125">size(</text:span></text:span><text:span text:style-name="Source_20_Text"><text:span text:style-name="T151">collection</text:span></text:span><text:span text:style-name="Source_20_Text"><text:span text:style-name="T125">);</text:span></text:span></text:p>
            <text:p text:style-name="P58"><text:span text:style-name="Source_20_Text"><text:span text:style-name="T125"/></text:span></text:p>
            <text:p text:style-name="P58"><text:span text:style-name="Source_20_Text"><text:span text:style-name="T127">slice(i</text:span></text:span><text:span text:style-name="Source_20_Text"><text:span text:style-name="T123">terator</text:span></text:span><text:span text:style-name="Source_20_Text"><text:span text:style-name="T127">[,begin=0[,end = Infinity]]);</text:span></text:span></text:p>
            <text:p text:style-name="P58"><text:span text:style-name="Source_20_Text"><text:span text:style-name="T127"/></text:span></text:p>
            <text:p text:style-name="P54"><text:span text:style-name="Source_20_Text"><text:span text:style-name="T125">withOut(i</text:span></text:span><text:span text:style-name="Source_20_Text"><text:span text:style-name="T138">terator</text:span></text:span><text:span text:style-name="Source_20_Text"><text:span text:style-name="T125">,filter</text:span></text:span><text:span text:style-name="Source_20_Text"><text:span text:style-name="T138">Iterator</text:span></text:span><text:span text:style-name="Source_20_Text"><text:span text:style-name="T125">);</text:span></text:span></text:p>
            <text:p text:style-name="P54"><text:span text:style-name="Source_20_Text"><text:span text:style-name="T125"/></text:span></text:p>
            <text:p text:style-name="P58"><text:span text:style-name="Source_20_Text"><text:span text:style-name="T152">unique(iterator[,resolver]);</text:span></text:span></text:p>
            <text:p text:style-name="P58"><text:span text:style-name="Source_20_Text"><text:span text:style-name="T152"/></text:span></text:p>
            <text:p text:style-name="P58"><text:span text:style-name="Source_20_Text"><text:span text:style-name="T152">includes(</text:span></text:span><text:span text:style-name="Source_20_Text"><text:span text:style-name="T153">collection</text:span></text:span><text:span text:style-name="Source_20_Text"><text:span text:style-name="T152">,</text:span></text:span><text:span text:style-name="Source_20_Text"><text:span text:style-name="T154">val</text:span></text:span><text:span text:style-name="Source_20_Text"><text:span text:style-name="T153">[,comparator]</text:span></text:span><text:span text:style-name="Source_20_Text"><text:span text:style-name="T152">);</text:span></text:span></text:p>
          </table:table-cell>
          <table:table-cell table:style-name="Table4.C2" office:value-type="string">
            <text:p text:style-name="P65"><text:span text:style-name="Source_20_Text"><text:span text:style-name="T155">ty</text:span></text:span><text:span text:style-name="Source_20_Text"><text:span text:style-name="T156">pe</text:span></text:span><text:span text:style-name="Source_20_Text"><text:span text:style-name="T157">Of</text:span></text:span><text:span text:style-name="Source_20_Text"><text:span text:style-name="T156">(v</text:span></text:span><text:span text:style-name="Source_20_Text"><text:span text:style-name="T155">alue</text:span></text:span><text:span text:style-name="Source_20_Text"><text:span text:style-name="T156">);</text:span></text:span></text:p>
            <text:p text:style-name="P65"><text:span text:style-name="Source_20_Text"><text:span text:style-name="T158">constructorOf(value);</text:span></text:span></text:p>
            <text:p text:style-name="P28"><text:span text:style-name="Source_20_Text"><text:span text:style-name="T159">is(</text:span></text:span><text:span text:style-name="Source_20_Text"><text:span text:style-name="T160">val</text:span></text:span><text:span text:style-name="Source_20_Text"><text:span text:style-name="T159">[,expectedType[,Throw=false]]</text:span></text:span><text:span text:style-name="Source_20_Text"><text:span text:style-name="T161">)</text:span></text:span><text:span text:style-name="Source_20_Text"><text:span text:style-name="T159">;</text:span></text:span></text:p>
            <text:p text:style-name="P28"><text:span text:style-name="Source_20_Text"><text:span text:style-name="T159">isTypedCollection(iter,expectedType, Throw=false);</text:span></text:span></text:p>
            <text:p text:style-name="P29"><text:span text:style-name="Source_20_Text"><text:span text:style-name="T162">isSameType(value1,value2)</text:span></text:span><text:span text:style-name="Source_20_Text"><text:span text:style-name="T163">;</text:span></text:span></text:p>
            <text:p text:style-name="P28"><text:span text:style-name="Source_20_Text"><text:span text:style-name="T10">isSameInstance(</text:span></text:span><text:span text:style-name="Source_20_Text"><text:span text:style-name="T164">v</text:span></text:span><text:span text:style-name="Source_20_Text"><text:span text:style-name="T165">al</text:span></text:span><text:span text:style-name="Source_20_Text"><text:span text:style-name="T164">1</text:span></text:span><text:span text:style-name="Source_20_Text"><text:span text:style-name="T10">,</text:span></text:span><text:span text:style-name="Source_20_Text"><text:span text:style-name="T164">v</text:span></text:span><text:span text:style-name="Source_20_Text"><text:span text:style-name="T165">al</text:span></text:span><text:span text:style-name="Source_20_Text"><text:span text:style-name="T164">2</text:span></text:span><text:span text:style-name="Source_20_Text"><text:span text:style-name="T10">,Contructor);</text:span></text:span></text:p>
            <text:p text:style-name="P28"><text:span text:style-name="Source_20_Text"><text:span text:style-name="T166">isDeepStrictEqual(v</text:span></text:span><text:span text:style-name="Source_20_Text"><text:span text:style-name="T167">al</text:span></text:span><text:span text:style-name="Source_20_Text"><text:span text:style-name="T168">ue</text:span></text:span><text:span text:style-name="Source_20_Text"><text:span text:style-name="T166">1,v</text:span></text:span><text:span text:style-name="Source_20_Text"><text:span text:style-name="T167">al</text:span></text:span><text:span text:style-name="Source_20_Text"><text:span text:style-name="T168">ue</text:span></text:span><text:span text:style-name="Source_20_Text"><text:span text:style-name="T166">2);</text:span></text:span></text:p>
            <text:p text:style-name="P28"><text:span text:style-name="Source_20_Text"><text:span text:style-name="T10">isCoercedObject</text:span></text:span><text:span text:style-name="Source_20_Text"><text:span text:style-name="T169">(object);</text:span></text:span></text:p>
            <text:p text:style-name="P28"><text:span text:style-name="Source_20_Text"><text:span text:style-name="T166">isEmpty(value);</text:span></text:span></text:p>
            <text:p text:style-name="P28"><text:span text:style-name="Source_20_Text"><text:span text:style-name="T10">isNull(v</text:span></text:span><text:span text:style-name="Source_20_Text"><text:span text:style-name="T170">a</text:span></text:span><text:span text:style-name="Source_20_Text"><text:span text:style-name="T171">lue</text:span></text:span><text:span text:style-name="Source_20_Text"><text:span text:style-name="T10">);</text:span></text:span></text:p>
            <text:p text:style-name="P28"><text:span text:style-name="Source_20_Text"><text:span text:style-name="T10">isUndefined(v</text:span></text:span><text:span text:style-name="Source_20_Text"><text:span text:style-name="T172">alu</text:span></text:span><text:span text:style-name="Source_20_Text"><text:span text:style-name="T65">e</text:span></text:span><text:span text:style-name="Source_20_Text"><text:span text:style-name="T10">);</text:span></text:span></text:p>
            <text:p text:style-name="P28"><text:span text:style-name="Source_20_Text"><text:span text:style-name="T10">isN</text:span></text:span><text:span text:style-name="Source_20_Text"><text:span text:style-name="T173">ullish</text:span></text:span><text:span text:style-name="Source_20_Text"><text:span text:style-name="T10">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28"><text:span text:style-name="Source_20_Text"><text:span text:style-name="T57">isNonNullable(value);</text:span></text:span></text:p>
            <text:p text:style-name="P28"><text:span text:style-name="Source_20_Text"><text:span text:style-name="T57">isNonNullablePrimitive(value);</text:span></text:span></text:p>
            <text:p text:style-name="P28"><text:span text:style-name="Source_20_Text"><text:span text:style-name="T174">isPlainObject(value);</text:span></text:span></text:p>
            <text:p text:style-name="P28"><text:span text:style-name="Source_20_Text"><text:span text:style-name="T10">isFunction(v</text:span></text:span><text:span text:style-name="Source_20_Text"><text:span text:style-name="T95">a</text:span></text:span><text:span text:style-name="Source_20_Text"><text:span text:style-name="T96">l</text:span></text:span><text:span text:style-name="Source_20_Text"><text:span text:style-name="T175">ue</text:span></text:span><text:span text:style-name="Source_20_Text"><text:span text:style-name="T10">);</text:span></text:span></text:p>
            <text:p text:style-name="P28"><text:span text:style-name="Source_20_Text"><text:span text:style-name="T10">isGenerator</text:span></text:span><text:span text:style-name="Source_20_Text"><text:span text:style-name="T176">F</text:span></text:span><text:span text:style-name="Source_20_Text"><text:span text:style-name="T177">u</text:span></text:span><text:span text:style-name="Source_20_Text"><text:span text:style-name="T176">n</text:span></text:span><text:span text:style-name="Source_20_Text"><text:span text:style-name="T177">ction</text:span></text:span><text:span text:style-name="Source_20_Text"><text:span text:style-name="T10">(v</text:span></text:span><text:span text:style-name="Source_20_Text"><text:span text:style-name="T178">a</text:span></text:span><text:span text:style-name="Source_20_Text"><text:span text:style-name="T179">lue</text:span></text:span><text:span text:style-name="Source_20_Text"><text:span text:style-name="T10">);</text:span></text:span></text:p>
            <text:p text:style-name="P28"><text:span text:style-name="Source_20_Text"><text:span text:style-name="T10">isAsync</text:span></text:span><text:span text:style-name="Source_20_Text"><text:span text:style-name="T176">F</text:span></text:span><text:span text:style-name="Source_20_Text"><text:span text:style-name="T177">u</text:span></text:span><text:span text:style-name="Source_20_Text"><text:span text:style-name="T176">n</text:span></text:span><text:span text:style-name="Source_20_Text"><text:span text:style-name="T177">ction</text:span></text:span><text:span text:style-name="Source_20_Text"><text:span text:style-name="T10">(v</text:span></text:span><text:span text:style-name="Source_20_Text"><text:span text:style-name="T178">a</text:span></text:span><text:span text:style-name="Source_20_Text"><text:span text:style-name="T179">lue</text:span></text:span><text:span text:style-name="Source_20_Text"><text:span text:style-name="T10">);</text:span></text:span></text:p>
            <text:p text:style-name="P28"><text:span text:style-name="Source_20_Text"><text:span text:style-name="T180">isAsyncGenerator</text:span></text:span><text:span text:style-name="Source_20_Text"><text:span text:style-name="T176">F</text:span></text:span><text:span text:style-name="Source_20_Text"><text:span text:style-name="T177">u</text:span></text:span><text:span text:style-name="Source_20_Text"><text:span text:style-name="T176">n</text:span></text:span><text:span text:style-name="Source_20_Text"><text:span text:style-name="T177">ction</text:span></text:span><text:span text:style-name="Source_20_Text"><text:span text:style-name="T180">(v</text:span></text:span><text:span text:style-name="Source_20_Text"><text:span text:style-name="T178">a</text:span></text:span><text:span text:style-name="Source_20_Text"><text:span text:style-name="T179">lue</text:span></text:span><text:span text:style-name="Source_20_Text"><text:span text:style-name="T180">);</text:span></text:span></text:p>
            <text:p text:style-name="P28"><text:span text:style-name="Source_20_Text"><text:span text:style-name="T181">isArrow</text:span></text:span><text:span text:style-name="Source_20_Text"><text:span text:style-name="T176">F</text:span></text:span><text:span text:style-name="Source_20_Text"><text:span text:style-name="T177">u</text:span></text:span><text:span text:style-name="Source_20_Text"><text:span text:style-name="T176">n</text:span></text:span><text:span text:style-name="Source_20_Text"><text:span text:style-name="T177">ction</text:span></text:span><text:span text:style-name="Source_20_Text"><text:span text:style-name="T181">(</text:span></text:span><text:span text:style-name="Source_20_Text"><text:span text:style-name="T182">value</text:span></text:span><text:span text:style-name="Source_20_Text"><text:span text:style-name="T181">);</text:span></text:span></text:p>
            <text:p text:style-name="P28"><text:span text:style-name="Source_20_Text"><text:span text:style-name="T180">isProxy(value);</text:span></text:span></text:p>
            <text:p text:style-name="P28"><text:span text:style-name="Source_20_Text"><text:span text:style-name="T10">isElemen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28"><text:span text:style-name="Source_20_Text"><text:span text:style-name="T180">isRegexp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80">);</text:span></text:span></text:p>
            <text:p text:style-name="P28"><text:span text:style-name="Source_20_Text"><text:span text:style-name="T10">isArraylike(value);</text:span></text:span></text:p>
            <text:p text:style-name="P28"><text:span text:style-name="Source_20_Text"><text:span text:style-name="T10">isTypedArray(value);</text:span></text:span></text:p>
            <text:p text:style-name="P66"><text:span text:style-name="Source_20_Text"><text:span text:style-name="T10">isIterator(v</text:span></text:span><text:span text:style-name="Source_20_Text"><text:span text:style-name="T74">a</text:span></text:span><text:span text:style-name="Source_20_Text"><text:span text:style-name="T183">l</text:span></text:span><text:span text:style-name="Source_20_Text"><text:span text:style-name="T184">ue</text:span></text:span><text:span text:style-name="Source_20_Text"><text:span text:style-name="T10">);</text:span></text:span></text:p>
            <text:p text:style-name="P66"><text:span text:style-name="Source_20_Text"><text:span text:style-name="T10">isIterable(v</text:span></text:span><text:span text:style-name="Source_20_Text"><text:span text:style-name="T74">a</text:span></text:span><text:span text:style-name="Source_20_Text"><text:span text:style-name="T183">l</text:span></text:span><text:span text:style-name="Source_20_Text"><text:span text:style-name="T184">ue</text:span></text:span><text:span text:style-name="Source_20_Text"><text:span text:style-name="T10">);</text:span></text:span></text:p>
            <text:p text:style-name="P28"><text:span text:style-name="Source_20_Text"><text:span text:style-name="T10">isAsyncItera</text:span></text:span><text:span text:style-name="Source_20_Text"><text:span text:style-name="T181">tor</text:span></text:span><text:span text:style-name="Source_20_Text"><text:span text:style-name="T10">(</text:span></text:span><text:span text:style-name="Source_20_Text"><text:span text:style-name="T160">value</text:span></text:span><text:span text:style-name="Source_20_Text"><text:span text:style-name="T10">);</text:span></text:span></text:p>
            <text:p text:style-name="P28"><text:span text:style-name="Source_20_Text"><text:span text:style-name="T10">isAsyncIterable(</text:span></text:span><text:span text:style-name="Source_20_Text"><text:span text:style-name="T160">value</text:span></text:span><text:span text:style-name="Source_20_Text"><text:span text:style-name="T10">);</text:span></text:span></text:p>
            <text:p text:style-name="P28"><text:span text:style-name="Source_20_Text"><text:span text:style-name="T185">isPropertyKey(v</text:span></text:span><text:span text:style-name="Source_20_Text"><text:span text:style-name="T186">alu</text:span></text:span><text:span text:style-name="Source_20_Text"><text:span text:style-name="T187">e</text:span></text:span><text:span text:style-name="Source_20_Text"><text:span text:style-name="T185">);</text:span></text:span></text:p>
            <text:p text:style-name="P28"><text:span text:style-name="Source_20_Text"><text:span text:style-name="T185">toPropertyKey(v</text:span></text:span><text:span text:style-name="Source_20_Text"><text:span text:style-name="T187">alue</text:span></text:span><text:span text:style-name="Source_20_Text"><text:span text:style-name="T185">);</text:span></text:span></text:p>
            <text:p text:style-name="P28"><text:span text:style-name="Source_20_Text"><text:span text:style-name="T185">isPrimitive(v</text:span></text:span><text:span text:style-name="Source_20_Text"><text:span text:style-name="T188">a</text:span></text:span><text:span text:style-name="Source_20_Text"><text:span text:style-name="T189">lue</text:span></text:span><text:span text:style-name="Source_20_Text"><text:span text:style-name="T185">);</text:span></text:span></text:p>
            <text:p text:style-name="P28"><text:span text:style-name="Source_20_Text"><text:span text:style-name="T174">toPrimitive(valu</text:span></text:span><text:span text:style-name="Source_20_Text"><text:span text:style-name="T187">e</text:span></text:span><text:span text:style-name="Source_20_Text"><text:span text:style-name="T174">);</text:span></text:span></text:p>
            <text:p text:style-name="P67"><text:span text:style-name="Source_20_Text"><text:span text:style-name="T10">isObjec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 </text:span></text:span><text:span text:style-name="Source_20_Text"><text:span text:style-name="T190">and</text:span></text:span><text:span text:style-name="Source_20_Text"><text:span text:style-name="T191"> </text:span></text:span><text:span text:style-name="Source_20_Text"><text:span text:style-name="T174">toObject(v</text:span></text:span><text:span text:style-name="Source_20_Text"><text:span text:style-name="T192">alu</text:span></text:span><text:span text:style-name="Source_20_Text"><text:span text:style-name="T193">e</text:span></text:span><text:span text:style-name="Source_20_Text"><text:span text:style-name="T174">);</text:span></text:span></text:p>
            <text:p text:style-name="P29"><text:span text:style-name="Source_20_Text"><text:span text:style-name="T194">isIndex(v</text:span></text:span><text:span text:style-name="Source_20_Text"><text:span text:style-name="T195">alu</text:span></text:span><text:span text:style-name="Source_20_Text"><text:span text:style-name="T196">e</text:span></text:span><text:span text:style-name="Source_20_Text"><text:span text:style-name="T194">); <text:s/></text:span></text:span><text:span text:style-name="Source_20_Text"><text:span text:style-name="T197">and</text:span></text:span><text:span text:style-name="Source_20_Text"><text:span text:style-name="T198"> </text:span></text:span><text:span text:style-name="Source_20_Text"><text:span text:style-name="T199">to</text:span></text:span><text:span text:style-name="Source_20_Text"><text:span text:style-name="T194">Index(va</text:span></text:span><text:span text:style-name="Source_20_Text"><text:span text:style-name="T200">lue</text:span></text:span><text:span text:style-name="Source_20_Text"><text:span text:style-name="T194">);</text:span></text:span></text:p>
            <text:p text:style-name="P28"><text:span text:style-name="Source_20_Text"><text:span text:style-name="T186">isLength</text:span></text:span><text:span text:style-name="Source_20_Text"><text:span text:style-name="T201">(v</text:span></text:span><text:span text:style-name="Source_20_Text"><text:span text:style-name="T186">al</text:span></text:span><text:span text:style-name="Source_20_Text"><text:span text:style-name="T202">ue</text:span></text:span><text:span text:style-name="Source_20_Text"><text:span text:style-name="T201">); </text:span></text:span><text:span text:style-name="Source_20_Text"><text:span text:style-name="T203">and</text:span></text:span><text:span text:style-name="Source_20_Text"><text:span text:style-name="T204"> </text:span></text:span><text:span text:style-name="Source_20_Text"><text:span text:style-name="T185">toLength(value);</text:span></text:span></text:p>
            <text:p text:style-name="P28"><text:span text:style-name="Source_20_Text"><text:span text:style-name="T174">toSafeString</text:span></text:span><text:span text:style-name="Source_20_Text"><text:span text:style-name="T30">(value);</text:span></text:span></text:p>
          </table:table-cell>
        </table:table-row>
      </table:table>
      <text:p text:style-name="P6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9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0"><text:span text:style-name="T205">Celestra for </text:span><text:span text:style-name="T206">browser</text:span><text:span text:style-name="T205">: </text:span><text:span text:style-name="T207">celestra.</text:span><text:span text:style-name="T208">browser</text:span><text:span text:style-name="T209">.</text:span><text:span text:style-name="T207">js</text:span></text:p>
          </table:table-cell>
          <table:table-cell table:style-name="Table8.B2" table:number-columns-spanned="2" office:value-type="string">
            <text:p text:style-name="P71"><text:span text:style-name="T205">Celestra for Node.js </text:span><text:span text:style-name="T210">and Deno</text:span><text:span text:style-name="T205">: </text:span><text:span text:style-name="T211">celestra.</text:span><text:span text:style-name="T209">node.</text:span><text:span text:style-name="T211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2"/>
            <text:p text:style-name="P73">&lt;script type="module"&gt;</text:p>
            <text:p text:style-name="P74">// import the defaultExport object</text:p>
            <text:p text:style-name="P75">import defaultExport from "./celestra.browser.js";</text:p>
            <text:p text:style-name="P75">globalThis.celestra = defaultExport;</text:p>
            <text:p text:style-name="P75">globalThis.CEL = defaultExport;</text:p>
            <text:p text:style-name="P73">&lt;/script&gt;</text:p>
            <text:p text:style-name="P75"/>
            <text:p text:style-name="P73">&lt;script type="module"&gt;</text:p>
            <text:p text:style-name="P74">// import with default with name</text:p>
            <text:p text:style-name="P75">import { default as celestra } from "./celestra.browser.js";</text:p>
            <text:p text:style-name="P75">globalThis.celestra = celestra;</text:p>
            <text:p text:style-name="P75">globalThis.CEL = celestra;</text:p>
            <text:p text:style-name="P73">&lt;/script&gt;</text:p>
            <text:p text:style-name="P75"/>
            <text:p text:style-name="P73">&lt;script type="module"&gt;</text:p>
            <text:p text:style-name="P74">// import all into a new celestra object</text:p>
            <text:p text:style-name="P75">import * as celestra from "./celestra.browser.js";</text:p>
            <text:p text:style-name="P75">globalThis.celestra = celestra;</text:p>
            <text:p text:style-name="P75">globalThis.CEL = celestra;</text:p>
            <text:p text:style-name="P73">&lt;/script&gt;</text:p>
            <text:p text:style-name="P75"/>
            <text:p text:style-name="P73">&lt;script type="module"&gt;</text:p>
            <text:p text:style-name="P74">// import some functions</text:p>
            <text:p text:style-name="P75">import { first, <text:span text:style-name="T212">map</text:span> } from "./celestra.browser.js";</text:p>
            <text:p text:style-name="P75">globalThis.first = first;</text:p>
            <text:p text:style-name="P75">globalThis.<text:span text:style-name="T212">map</text:span> = <text:span text:style-name="T212">map</text:span>;</text:p>
            <text:p text:style-name="P73">&lt;/script&gt;</text:p>
            <text:p text:style-name="P73"/>
            <text:p text:style-name="P73">&lt;script type="module"&gt;</text:p>
            <text:p text:style-name="P75">// dynamic import</text:p>
            <text:p text:style-name="P75">const celestra = await import("./celestra.browser.js");</text:p>
            <text:p text:style-name="P75">globalThis.celestra = celestra;</text:p>
            <text:p text:style-name="P75">globalThis.CEL = celestra;</text:p>
            <text:p text:style-name="P73">&lt;/script&gt;</text:p>
            <text:p text:style-name="P73"/>
          </table:table-cell>
          <table:table-cell table:style-name="Table8.B3" table:number-columns-spanned="2" office:value-type="string">
            <text:p text:style-name="P76"/>
            <text:p text:style-name="P76">// import the defaultExport object</text:p>
            <text:p text:style-name="P77"/>
            <text:p text:style-name="P77">import defaultExport from "./celestra.<text:span text:style-name="T213">node</text:span>.js";</text:p>
            <text:p text:style-name="P77">globalThis.celestra = defaultExport;</text:p>
            <text:p text:style-name="P77">globalThis.CEL = defaultExport;</text:p>
            <text:p text:style-name="P77"/>
            <text:p text:style-name="P76">// import with default with name</text:p>
            <text:p text:style-name="P77"/>
            <text:p text:style-name="P77">import { default as celestra } from "./celestra.<text:span text:style-name="T213">node</text:span>.js";</text:p>
            <text:p text:style-name="P77">globalThis.celestra = celestra;</text:p>
            <text:p text:style-name="P77">globalThis.CEL = celestra;</text:p>
            <text:p text:style-name="P77"/>
            <text:p text:style-name="P76">// import all into a new celestra object</text:p>
            <text:p text:style-name="P77"/>
            <text:p text:style-name="P77">import * as celestra from "./celestra.<text:span text:style-name="T213">node</text:span>.js";</text:p>
            <text:p text:style-name="P77">globalThis.celestra = celestra;</text:p>
            <text:p text:style-name="P77">globalThis.CEL = celestra;</text:p>
            <text:p text:style-name="P77"/>
            <text:p text:style-name="P76">// import some functions</text:p>
            <text:p text:style-name="P77"/>
            <text:p text:style-name="P77">import { first, <text:span text:style-name="T212">map</text:span> } from "./celestra.<text:span text:style-name="T213">node</text:span>.js";</text:p>
            <text:p text:style-name="P77">globalThis.first = first;</text:p>
            <text:p text:style-name="P78"><text:span text:style-name="Source_20_Text"><text:span text:style-name="T214">globalThis.</text:span></text:span><text:span text:style-name="Source_20_Text"><text:span text:style-name="T215">map</text:span></text:span><text:span text:style-name="Source_20_Text"><text:span text:style-name="T214"> = </text:span></text:span><text:span text:style-name="Source_20_Text"><text:span text:style-name="T215">map</text:span></text:span><text:span text:style-name="Source_20_Text"><text:span text:style-name="T214">;<text:line-break/><text:line-break/></text:span></text:span><text:span text:style-name="Source_20_Text"><text:span text:style-name="T216">// </text:span></text:span><text:span text:style-name="Source_20_Text"><text:span text:style-name="T217">dynamic import</text:span></text:span><text:span text:style-name="Source_20_Text"><text:span text:style-name="T214"><text:line-break/><text:line-break/>const celestra = await import("./celestra.node.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9">Removed <text:span text:style-name="T218">APIs</text:span> in the <text:span text:style-name="T211">celestra.node.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0">DOM API</text:p>
          </table:table-cell>
          <table:table-cell table:style-name="Table8.C5" office:value-type="string">
            <text:p text:style-name="P81"><text:span text:style-name="Source_20_Text"><text:span text:style-name="T219">Cookie API</text:span></text:span></text:p>
          </table:table-cell>
        </table:table-row>
      </table:table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3"><text:span text:style-name="T220">v</text:span>3.1.0</text:p>
          </table:table-cell>
          <table:table-cell table:style-name="Table3.A2" office:value-type="string">
            <text:p text:style-name="P83">v3.8.0</text:p>
          </table:table-cell>
          <table:table-cell table:style-name="Table3.C2" office:value-type="string">
            <text:p text:style-name="P84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5">Array.from();</text:p>
            <text:p text:style-name="P85">Array.of();</text:p>
            <text:p text:style-name="P85">Array.prototype.copyWithin();</text:p>
            <text:p text:style-name="P85">Array.prototype.fill();</text:p>
            <text:p text:style-name="P85">Array.prototype.find();</text:p>
            <text:p text:style-name="P85">Array.prototype.findIndex();</text:p>
            <text:p text:style-name="P85">Object.create();</text:p>
            <text:p text:style-name="P85">String.fromCodePoint();</text:p>
            <text:p text:style-name="P85">String.prototype.codePointAt();</text:p>
            <text:p text:style-name="P85">String.prototype.endsWith();</text:p>
            <text:p text:style-name="P85">String.prototype.startsWith();</text:p>
            <text:p text:style-name="P85">Math.acosh();</text:p>
            <text:p text:style-name="P85">Math.asinh();</text:p>
            <text:p text:style-name="P85">Math.atanh();</text:p>
            <text:p text:style-name="P85">Math.cbrt();</text:p>
            <text:p text:style-name="P85">Math.clz32();</text:p>
            <text:p text:style-name="P85">Math.cosh();</text:p>
            <text:p text:style-name="P85">Math.expm1();</text:p>
            <text:p text:style-name="P85">Math.fround();</text:p>
            <text:p text:style-name="P85">Math.hypot();</text:p>
            <text:p text:style-name="P85">Math.imul();</text:p>
            <text:p text:style-name="P85">Math.log1p();</text:p>
            <text:p text:style-name="P85">Math.log10();</text:p>
            <text:p text:style-name="P85">Math.log2();</text:p>
            <text:p text:style-name="P85">Math.sign();</text:p>
            <text:p text:style-name="P85">Math.sinh();</text:p>
            <text:p text:style-name="P85">Math.tanh();</text:p>
            <text:p text:style-name="P85">Math.trunc();</text:p>
            <text:p text:style-name="P85">Number.EPSILON;</text:p>
            <text:p text:style-name="P85">Number.isNaN();</text:p>
            <text:p text:style-name="P85">isNaN();</text:p>
            <text:p text:style-name="P85">Number.isInteger();</text:p>
            <text:p text:style-name="P85">Number.isFinite();</text:p>
            <text:p text:style-name="P85">Number.isSafeInteger();</text:p>
            <text:p text:style-name="P85">Number.parseInt();</text:p>
            <text:p text:style-name="P85">Number.parseFloat();</text:p>
          </table:table-cell>
          <table:table-cell table:style-name="Table3.B3" table:number-rows-spanned="5" office:value-type="string">
            <text:p text:style-name="P86"><text:span text:style-name="Source_20_Text"><text:span text:style-name="T221"/></text:span></text:p>
            <text:p text:style-name="P86"><text:span text:style-name="Source_20_Text"><text:span text:style-name="T222">Array.prototype.values();</text:span></text:span></text:p>
            <text:p text:style-name="P86"><text:span text:style-name="Source_20_Text"><text:span text:style-name="T222">Array.prototype.includes();</text:span></text:span></text:p>
            <text:p text:style-name="P86"><text:span text:style-name="Source_20_Text"><text:span text:style-name="T221"/></text:span></text:p>
            <text:p text:style-name="P86"><text:span text:style-name="Source_20_Text"><text:span text:style-name="T222">ChildNode.after();</text:span></text:span><text:span text:style-name="T223"><text:line-break/></text:span><text:span text:style-name="Source_20_Text"><text:span text:style-name="T222">ChildNode.before();</text:span></text:span><text:span text:style-name="T223"><text:line-break/></text:span><text:span text:style-name="Source_20_Text"><text:span text:style-name="T222">ChildNode.remove();</text:span></text:span><text:span text:style-name="T223"><text:line-break/></text:span><text:span text:style-name="Source_20_Text"><text:span text:style-name="T222">ChildNode.replaceWith();</text:span></text:span></text:p>
            <text:p text:style-name="P86"><text:span text:style-name="Source_20_Text"><text:span text:style-name="T221"/></text:span></text:p>
            <text:p text:style-name="P86"><text:span text:style-name="Source_20_Text"><text:span text:style-name="T222">Element.prototype.closest();<text:line-break/>Element.prototype.getAttributeNames();</text:span></text:span></text:p>
            <text:p text:style-name="P86"><text:span text:style-name="Source_20_Text"><text:span text:style-name="T222">Element.prototype.matches();</text:span></text:span></text:p>
            <text:p text:style-name="P86"><text:span text:style-name="Source_20_Text"><text:span text:style-name="T222">Element.prototype.toggleAttribute();</text:span></text:span></text:p>
            <text:p text:style-name="P86"><text:span text:style-name="Source_20_Text"><text:span text:style-name="T221"/></text:span></text:p>
            <text:p text:style-name="P86"><text:span text:style-name="Source_20_Text"><text:span text:style-name="T222">ParentNode.append();</text:span></text:span></text:p>
            <text:p text:style-name="P87"><text:span text:style-name="Source_20_Text"><text:span text:style-name="T222">ParentNode.prepend();</text:span></text:span><text:span text:style-name="T223"><text:line-break/></text:span></text:p>
            <text:p text:style-name="P87"><text:span text:style-name="Source_20_Text"><text:span text:style-name="T222">String.prototype[Symbol.iterator]();</text:span></text:span></text:p>
            <text:p text:style-name="P86"><text:span text:style-name="Source_20_Text"><text:span text:style-name="T222">String.prototype.includes();</text:span></text:span></text:p>
            <text:p text:style-name="P86"><text:span text:style-name="Source_20_Text"><text:span text:style-name="T222">String.prototype.repeat();</text:span></text:span></text:p>
            <text:p text:style-name="P86"><text:span text:style-name="Source_20_Text"><text:span text:style-name="T221"/></text:span></text:p>
            <text:p text:style-name="P86"><text:span text:style-name="Source_20_Text"><text:span text:style-name="T222">NodeList.prototype.forEach();</text:span></text:span></text:p>
            <text:p text:style-name="P86"><text:span text:style-name="Source_20_Text"><text:span text:style-name="T221"/></text:span></text:p>
            <text:p text:style-name="P86"><text:span text:style-name="Source_20_Text"><text:span text:style-name="T222">Object.assign();</text:span></text:span></text:p>
            <text:p text:style-name="P86"><text:span text:style-name="Source_20_Text"><text:span text:style-name="T222">Object.entries();</text:span></text:span></text:p>
            <text:p text:style-name="P88"><text:span text:style-name="Source_20_Text"><text:span text:style-name="T222">Object.getOwnPropertyDescriptors();</text:span></text:span></text:p>
            <text:p text:style-name="P88"><text:span text:style-name="Source_20_Text"><text:span text:style-name="T222">Object.values();</text:span></text:span></text:p>
            <text:p text:style-name="P86"><text:span text:style-name="Source_20_Text"><text:span text:style-name="T221"/></text:span></text:p>
            <text:p text:style-name="P86"><text:span text:style-name="Source_20_Text"><text:span text:style-name="T222">RegExp.prototype.flags;</text:span></text:span></text:p>
            <text:p text:style-name="P86"><text:span text:style-name="Source_20_Text"><text:span text:style-name="T221"/></text:span></text:p>
            <text:p text:style-name="P89"><text:span text:style-name="Source_20_Text"><text:span text:style-name="T224">window</text:span></text:span><text:span text:style-name="Source_20_Text"><text:span text:style-name="T222">.screenLeft;</text:span></text:span></text:p>
            <text:p text:style-name="P89"><text:span text:style-name="Source_20_Text"><text:span text:style-name="T224">window</text:span></text:span><text:span text:style-name="Source_20_Text"><text:span text:style-name="T222">.screenTop;</text:span></text:span></text:p>
          </table:table-cell>
          <table:table-cell table:style-name="Table3.C3" office:value-type="string">
            <text:p text:style-name="P90">Array.prototype.at();</text:p>
            <text:p text:style-name="P90">Array.prototype.findLast();</text:p>
            <text:p text:style-name="P90">Array.prototype.findLastIndex();</text:p>
            <text:p text:style-name="P90">Array.prototype.flat();</text:p>
            <text:p text:style-name="P90">Array.prototype.flatMap();</text:p>
            <text:p text:style-name="P90">Number.MIN_SAFE_INTEGER;</text:p>
            <text:p text:style-name="P90">Number.MAX_SAFE_INTEGER;</text:p>
            <text:p text:style-name="P90">Object.fromEntries();</text:p>
            <text:p text:style-name="P90">Object.is();</text:p>
            <text:p text:style-name="P90">String.prototype.at();</text:p>
            <text:p text:style-name="P90">String.prototype.matchAll();</text:p>
            <text:p text:style-name="P90">String.prototype.padStart();</text:p>
            <text:p text:style-name="P90">String.prototype.padEnd();</text:p>
            <text:p text:style-name="P90">String.prototype.replaceAll();</text:p>
            <text:p text:style-name="P90">String.prototype.trimStart();</text:p>
            <text:p text:style-name="P90">String.prototype.trimLeft();</text:p>
            <text:p text:style-name="P90">String.prototype.trimEnd();</text:p>
            <text:p text:style-name="P90">String.prototype.trimRight();</text:p>
            <text:p text:style-name="P90">Typedarray.prototype.at();</text:p>
            <text:p text:style-name="P90">TypedArray.prototype.findLast();</text:p>
            <text:p text:style-name="P90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4">v5.<text:span text:style-name="T225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0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1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2">Map.groupBy(); <text:span text:style-name="T226">and </text:span>Object.groupBy();</text:p>
            <text:p text:style-name="P92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05T21:15:45.992294000</dc:date>
    <meta:print-date>2026-06-05T21:22:56.931571000</meta:print-date>
    <meta:editing-cycles>1320</meta:editing-cycles>
    <meta:editing-duration>P1DT16H22M46S</meta:editing-duration>
    <meta:printed-by>PDF files</meta:printed-by>
    <meta:document-statistic meta:table-count="5" meta:image-count="0" meta:object-count="0" meta:page-count="5" meta:paragraph-count="381" meta:word-count="639" meta:character-count="9772" meta:non-whitespace-character-count="9505"/>
    <meta:template xlink:type="simple" xlink:actuate="onRequest" xlink:title="" xlink:href="Normal.dotm"/>
  </office:meta>
</office:document-meta>
</file>