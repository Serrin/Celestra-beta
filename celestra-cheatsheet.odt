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c5ef7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46496be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465e865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695e1cb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officeooo:rsid="04144748"/>
    </style:style>
    <style:style style:name="T205" style:family="text">
      <style:text-properties officeooo:rsid="0478c748"/>
    </style:style>
    <style:style style:name="T206" style:family="text">
      <style:text-properties fo:font-style="italic" officeooo:rsid="040de640" style:font-style-asian="italic" style:font-style-complex="italic"/>
    </style:style>
    <style:style style:name="T207" style:family="text">
      <style:text-properties fo:font-style="italic" officeooo:rsid="0478c748" style:font-style-asian="italic" style:font-style-complex="italic"/>
    </style:style>
    <style:style style:name="T208" style:family="text">
      <style:text-properties fo:font-style="italic" officeooo:rsid="04125c48" style:font-style-asian="italic" style:font-style-complex="italic"/>
    </style:style>
    <style:style style:name="T209" style:family="text">
      <style:text-properties officeooo:rsid="042d7d17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officeooo:rsid="051a58c7"/>
    </style:style>
    <style:style style:name="T212" style:family="text">
      <style:text-properties officeooo:rsid="0424aa9b"/>
    </style:style>
    <style:style style:name="T213" style:family="text">
      <style:text-properties style:font-name="Courier New" fo:font-size="10pt" officeooo:rsid="040de640" style:font-size-asian="10pt" style:font-size-complex="10pt"/>
    </style:style>
    <style:style style:name="T214" style:family="text">
      <style:text-properties style:font-name="Courier New" fo:font-size="10pt" officeooo:rsid="051a58c7" style:font-size-asian="10pt" style:font-size-complex="10pt"/>
    </style:style>
    <style:style style:name="T215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16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17" style:family="text">
      <style:text-properties officeooo:rsid="048a07de"/>
    </style:style>
    <style:style style:name="T218" style:family="text">
      <style:text-properties style:font-name="Courier New" officeooo:rsid="040de640"/>
    </style:style>
    <style:style style:name="T219" style:family="text">
      <style:text-properties officeooo:rsid="04546f38"/>
    </style:style>
    <style:style style:name="T22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1" style:family="text">
      <style:text-properties fo:language="zxx" fo:country="none" style:language-asian="zxx" style:country-asian="none" style:language-complex="zxx" style:country-complex="none"/>
    </style:style>
    <style:style style:name="T222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3" style:family="text">
      <style:text-properties officeooo:rsid="03f9c86c"/>
    </style:style>
    <style:style style:name="T224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/></text:span></text:p>
            <text:p text:style-name="P49"><text:span text:style-name="Source_20_Text"><text:span text:style-name="T121">arrayRange([start=0[,end=</text:span></text:span><text:span text:style-name="Source_20_Text"><text:span text:style-name="T122">99</text:span></text:span><text:span text:style-name="Source_20_Text"><text:span text:style-name="T121">[,step=1]]]);</text:span></text:span></text:p>
            <text:p text:style-name="P50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</text:span></text:span><text:span text:style-name="Source_20_Text"><text:span text:style-name="T124">=100</text:span></text:span><text:span text:style-name="Source_20_Text"><text:span text:style-name="T58">]);</text:span></text:span></text:p>
            <text:p text:style-name="P50"><text:span text:style-name="Source_20_Text"><text:span text:style-name="T125">arrayRepeat(value[,n</text:span></text:span><text:span text:style-name="Source_20_Text"><text:span text:style-name="T126">=100</text:span></text:span><text:span text:style-name="Source_20_Text"><text:span text:style-name="T125">]);</text:span></text:span></text:p>
            <text:p text:style-name="P50"><text:span text:style-name="Source_20_Text"><text:span text:style-name="T125"/></text:span></text:p>
            <text:p text:style-name="P51"><text:span text:style-name="Source_20_Text"><text:span text:style-name="T127">iterRange([start=0[,step=1[,end=Infinity]]]);</text:span></text:span></text:p>
            <text:p text:style-name="P51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</text:span></text:span><text:span text:style-name="Source_20_Text"><text:span text:style-name="T129">=Infinity</text:span></text:span><text:span text:style-name="Source_20_Text"><text:span text:style-name="T127">]);</text:span></text:span></text:p>
            <text:p text:style-name="P51"><text:span text:style-name="Source_20_Text"><text:span text:style-name="T58">iterRepeat(value[,n</text:span></text:span><text:span text:style-name="Source_20_Text"><text:span text:style-name="T129">=Infinity</text:span></text:span><text:span text:style-name="Source_20_Text"><text:span text:style-name="T58">]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3">terator</text:span></text:span><text:span text:style-name="Source_20_Text"><text:span text:style-name="T131">,callback);</text:span></text:span></text:p>
            <text:p text:style-name="P53"><text:span text:style-name="Source_20_Text"><text:span text:style-name="T113"/></text:span></text:p>
            <text:p text:style-name="P54"><text:span text:style-name="Source_20_Text"><text:span text:style-name="T132">findLast(i</text:span></text:span><text:span text:style-name="Source_20_Text"><text:span text:style-name="T133">terator</text:span></text:span><text:span text:style-name="Source_20_Text"><text:span text:style-name="T132">,callback);</text:span></text:span></text:p>
            <text:p text:style-name="P54"><text:span text:style-name="Source_20_Text"><text:span text:style-name="T132"/></text:span></text:p>
            <text:p text:style-name="P55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6"><text:span text:style-name="Source_20_Text"><text:span text:style-name="T134">unzip(i</text:span></text:span><text:span text:style-name="Source_20_Text"><text:span text:style-name="T133">terator</text:span></text:span><text:span text:style-name="Source_20_Text"><text:span text:style-name="T134">);</text:span></text:span></text:p>
            <text:p text:style-name="P56"><text:span text:style-name="Source_20_Text"><text:span text:style-name="T134"/></text:span></text:p>
            <text:p text:style-name="P56"><text:span text:style-name="Source_20_Text"><text:span text:style-name="T134">zipObj(i</text:span></text:span><text:span text:style-name="Source_20_Text"><text:span text:style-name="T133">terator1</text:span></text:span><text:span text:style-name="Source_20_Text"><text:span text:style-name="T134">,i</text:span></text:span><text:span text:style-name="Source_20_Text"><text:span text:style-name="T133">terator</text:span></text:span><text:span text:style-name="Source_20_Text"><text:span text:style-name="T135">2</text:span></text:span><text:span text:style-name="Source_20_Text"><text:span text:style-name="T134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137">sort(i</text:span></text:span><text:span text:style-name="Source_20_Text"><text:span text:style-name="T123">terator</text:span></text:span><text:span text:style-name="Source_20_Text"><text:span text:style-name="T138">[</text:span></text:span><text:span text:style-name="Source_20_Text"><text:span text:style-name="T137">,number</text:span></text:span><text:span text:style-name="Source_20_Text"><text:span text:style-name="T139">s = false</text:span></text:span><text:span text:style-name="Source_20_Text"><text:span text:style-name="T138">]</text:span></text:span><text:span text:style-name="Source_20_Text"><text:span text:style-name="T137">);</text:span></text:span></text:p>
            <text:p text:style-name="P57"><text:span text:style-name="Source_20_Text"><text:span text:style-name="T137"/></text:span></text:p>
            <text:p text:style-name="P57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</text:span></text:span><text:span text:style-name="Source_20_Text"><text:span text:style-name="T140">=","</text:span></text:span><text:span text:style-name="Source_20_Text"><text:span text:style-name="T127">]);</text:span></text:span></text:p>
            <text:p text:style-name="P57"><text:span text:style-name="Source_20_Text"><text:span text:style-name="T125"/></text:span></text:p>
            <text:p text:style-name="P57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=Infinity]]);</text:span></text:span></text:p>
            <text:p text:style-name="P57"><text:span text:style-name="Source_20_Text"><text:span text:style-name="T127"/></text:span></text:p>
            <text:p text:style-name="P57"><text:span text:style-name="Source_20_Text"><text:span text:style-name="T141">unique(iterator[,resolver]);</text:span></text:span></text:p>
            <text:p text:style-name="P57"><text:span text:style-name="Source_20_Text"><text:span text:style-name="T141"/></text:span></text:p>
            <text:p text:style-name="P57"><text:span text:style-name="Source_20_Text"><text:span text:style-name="T141">includes(</text:span></text:span><text:span text:style-name="Source_20_Text"><text:span text:style-name="T142">collection</text:span></text:span><text:span text:style-name="Source_20_Text"><text:span text:style-name="T141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141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8"/></text:span></text:p>
            <text:p text:style-name="P58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8"><text:span text:style-name="Source_20_Text"><text:span text:style-name="T144">nth(i</text:span></text:span><text:span text:style-name="Source_20_Text"><text:span text:style-name="T123">terator</text:span></text:span><text:span text:style-name="Source_20_Text"><text:span text:style-name="T144">,index);</text:span></text:span></text:p>
            <text:p text:style-name="P58"><text:span text:style-name="Source_20_Text"><text:span text:style-name="T144"/></text:span></text:p>
            <text:p text:style-name="P59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9"><text:span text:style-name="Source_20_Text"><text:span text:style-name="T145">head(i</text:span></text:span><text:span text:style-name="Source_20_Text"><text:span text:style-name="T133">terator</text:span></text:span><text:span text:style-name="Source_20_Text"><text:span text:style-name="T145">);</text:span></text:span></text:p>
            <text:p text:style-name="P59"><text:span text:style-name="Source_20_Text"><text:span text:style-name="T145"/></text:span></text:p>
            <text:p text:style-name="P59"><text:span text:style-name="Source_20_Text"><text:span text:style-name="T127">last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revers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59"><text:span text:style-name="T146">initial(i</text:span><text:span text:style-name="Source_20_Text"><text:span text:style-name="T123">terator</text:span></text:span><text:span text:style-name="T146">);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7">tail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shuffl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60"><text:span text:style-name="Source_20_Text"><text:span text:style-name="T147">compact</text:span></text:span><text:span text:style-name="Source_20_Text"><text:span text:style-name="T148">(</text:span></text:span><text:span text:style-name="Source_20_Text"><text:span text:style-name="T149">collection</text:span></text:span><text:span text:style-name="Source_20_Text"><text:span text:style-name="T148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5">size(</text:span></text:span><text:span text:style-name="Source_20_Text"><text:span text:style-name="T150">collection</text:span></text:span><text:span text:style-name="Source_20_Text"><text:span text:style-name="T125">);</text:span></text:span></text:p>
            <text:p text:style-name="P59"><text:span text:style-name="Source_20_Text"><text:span text:style-name="T125"/></text:span></text:p>
            <text:p text:style-name="P58"><text:span text:style-name="Source_20_Text"><text:span text:style-name="T58">min(v</text:span></text:span><text:span text:style-name="Source_20_Text"><text:span text:style-name="T151">alue1[,valueN]</text:span></text:span><text:span text:style-name="Source_20_Text"><text:span text:style-name="T58">);</text:span></text:span></text:p>
            <text:p text:style-name="P61"><text:span text:style-name="Source_20_Text"><text:span text:style-name="T152">max(v</text:span></text:span><text:span text:style-name="Source_20_Text"><text:span text:style-name="T153">alue1[,valueN]</text:span></text:span><text:span text:style-name="Source_20_Text"><text:span text:style-name="T152">);</text:span></text:span></text:p>
            <text:p text:style-name="P59"><text:span text:style-name="Source_20_Text"><text:span text:style-name="T125"/></text:span></text:p>
          </table:table-cell>
          <table:table-cell table:style-name="Table4.C2" office:value-type="string">
            <text:p text:style-name="P62"><text:span text:style-name="Source_20_Text"><text:span text:style-name="T154">isPrimitive(v</text:span></text:span><text:span text:style-name="Source_20_Text"><text:span text:style-name="T155">a</text:span></text:span><text:span text:style-name="Source_20_Text"><text:span text:style-name="T156">lue</text:span></text:span><text:span text:style-name="Source_20_Text"><text:span text:style-name="T154">);</text:span></text:span></text:p>
          </table:table-cell>
          <table:table-cell table:style-name="Table4.D2" office:value-type="string">
            <text:p text:style-name="P62"><text:span text:style-name="Source_20_Text"><text:span text:style-name="T157">toPrimitive(valu</text:span></text:span><text:span text:style-name="Source_20_Text"><text:span text:style-name="T158">e</text:span></text:span><text:span text:style-name="Source_20_Text"><text:span text:style-name="T157">);</text:span></text:span></text:p>
          </table:table-cell>
        </table:table-row>
        <table:table-row>
          <table:covered-table-cell table:style-name="Table4.A3"/>
          <table:covered-table-cell table:style-name="Table4.B3"/>
          <table:table-cell table:style-name="Table4.C2" office:value-type="string">
            <text:p text:style-name="P62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</table:table-cell>
          <table:table-cell table:style-name="Table4.D2" office:value-type="string">
            <text:p text:style-name="P62"><text:span text:style-name="Source_20_Text"><text:span text:style-name="T157">toObject(v</text:span></text:span><text:span text:style-name="Source_20_Text"><text:span text:style-name="T159">alu</text:span></text:span><text:span text:style-name="Source_20_Text"><text:span text:style-name="T160">e</text:span></text:span><text:span text:style-name="Source_20_Text"><text:span text:style-name="T157">);</text:span></text:span></text:p>
          </table:table-cell>
        </table:table-row>
        <table:table-row table:style-name="Table4.4">
          <table:covered-table-cell table:style-name="Table4.A3"/>
          <table:covered-table-cell table:style-name="Table4.B3"/>
          <table:table-cell table:style-name="Table4.C4" office:value-type="string">
            <text:p text:style-name="P62"><text:span text:style-name="Source_20_Text"><text:span text:style-name="T154">isPropertyKey(v</text:span></text:span><text:span text:style-name="Source_20_Text"><text:span text:style-name="T161">alu</text:span></text:span><text:span text:style-name="Source_20_Text"><text:span text:style-name="T158">e</text:span></text:span><text:span text:style-name="Source_20_Text"><text:span text:style-name="T154">);</text:span></text:span></text:p>
          </table:table-cell>
          <table:table-cell table:style-name="Table4.D4" office:value-type="string">
            <text:p text:style-name="P62"><text:span text:style-name="Source_20_Text"><text:span text:style-name="T154">toPropertyKey(v</text:span></text:span><text:span text:style-name="Source_20_Text"><text:span text:style-name="T158">alue</text:span></text:span><text:span text:style-name="Source_20_Text"><text:span text:style-name="T154">);</text:span></text:span></text:p>
          </table:table-cell>
        </table:table-row>
        <table:table-row>
          <table:covered-table-cell table:style-name="Table4.A3"/>
          <table:covered-table-cell table:style-name="Table4.B3"/>
          <table:table-cell table:style-name="Table4.C5" office:value-type="string">
            <text:p text:style-name="P63"><text:span text:style-name="Source_20_Text"><text:span text:style-name="T162">isIndex(v</text:span></text:span><text:span text:style-name="Source_20_Text"><text:span text:style-name="T163">alu</text:span></text:span><text:span text:style-name="Source_20_Text"><text:span text:style-name="T164">e</text:span></text:span><text:span text:style-name="Source_20_Text"><text:span text:style-name="T162">);</text:span></text:span></text:p>
          </table:table-cell>
          <table:table-cell table:style-name="Table4.D5" office:value-type="string">
            <text:p text:style-name="P63"><text:span text:style-name="Source_20_Text"><text:span text:style-name="T165">to</text:span></text:span><text:span text:style-name="Source_20_Text"><text:span text:style-name="T162">Index(va</text:span></text:span><text:span text:style-name="Source_20_Text"><text:span text:style-name="T166">lue</text:span></text:span><text:span text:style-name="Source_20_Text"><text:span text:style-name="T162">);</text:span></text:span></text:p>
          </table:table-cell>
        </table:table-row>
        <table:table-row>
          <table:covered-table-cell table:style-name="Table4.A6"/>
          <table:covered-table-cell table:style-name="Table4.B6"/>
          <table:table-cell table:style-name="Table4.C6" office:value-type="string">
            <text:p text:style-name="P62"><text:span text:style-name="Source_20_Text"><text:span text:style-name="T161">isLength</text:span></text:span><text:span text:style-name="Source_20_Text"><text:span text:style-name="T167">(v</text:span></text:span><text:span text:style-name="Source_20_Text"><text:span text:style-name="T161">al</text:span></text:span><text:span text:style-name="Source_20_Text"><text:span text:style-name="T168">ue</text:span></text:span><text:span text:style-name="Source_20_Text"><text:span text:style-name="T167">);</text:span></text:span></text:p>
          </table:table-cell>
          <table:table-cell table:style-name="Table4.D6" office:value-type="string">
            <text:p text:style-name="P62"><text:span text:style-name="Source_20_Text"><text:span text:style-name="T154">toLength(value);</text:span></text:span></text:p>
          </table:table-cell>
        </table:table-row>
        <table:table-row>
          <table:covered-table-cell table:style-name="Table4.A3"/>
          <table:covered-table-cell table:style-name="Table4.B3"/>
          <table:table-cell table:style-name="Table4.C7" table:number-columns-spanned="2" office:value-type="string">
            <text:p text:style-name="P64"><text:span text:style-name="Source_20_Text"><text:span text:style-name="T169">ty</text:span></text:span><text:span text:style-name="Source_20_Text"><text:span text:style-name="T170">pe</text:span></text:span><text:span text:style-name="Source_20_Text"><text:span text:style-name="T171">Of</text:span></text:span><text:span text:style-name="Source_20_Text"><text:span text:style-name="T170">(v</text:span></text:span><text:span text:style-name="Source_20_Text"><text:span text:style-name="T169">alue</text:span></text:span><text:span text:style-name="Source_20_Text"><text:span text:style-name="T170">);</text:span></text:span></text:p>
            <text:p text:style-name="P64"><text:span text:style-name="Source_20_Text"><text:span text:style-name="T172">constructorOf(value);</text:span></text:span></text:p>
            <text:p text:style-name="P64"><text:span text:style-name="Source_20_Text"><text:span text:style-name="T173">is(</text:span></text:span><text:span text:style-name="Source_20_Text"><text:span text:style-name="T174">val</text:span></text:span><text:span text:style-name="Source_20_Text"><text:span text:style-name="T173">[,expectedType[,Throw=false]]</text:span></text:span><text:span text:style-name="Source_20_Text"><text:span text:style-name="T175">)</text:span></text:span><text:span text:style-name="Source_20_Text"><text:span text:style-name="T173">;</text:span></text:span></text:p>
            <text:p text:style-name="P64"><text:span text:style-name="Source_20_Text"><text:span text:style-name="T176">isEmpty(value);</text:span></text:span></text:p>
            <text:p text:style-name="P64"><text:span text:style-name="Source_20_Text"><text:span text:style-name="T177">isTypedCollection(iter</text:span></text:span><text:span text:style-name="Source_20_Text"><text:span text:style-name="T178">ator</text:span></text:span><text:span text:style-name="Source_20_Text"><text:span text:style-name="T177">,expectedType,Throw=false);</text:span></text:span></text:p>
            <text:p text:style-name="P64"><text:span text:style-name="Source_20_Text"><text:span text:style-name="T179">isSameType(value1,value2)</text:span></text:span><text:span text:style-name="Source_20_Text"><text:span text:style-name="T180">;</text:span></text:span></text:p>
            <text:p text:style-name="P64"><text:span text:style-name="Source_20_Text"><text:span text:style-name="T10">isSameInstance(</text:span></text:span><text:span text:style-name="Source_20_Text"><text:span text:style-name="T181">v</text:span></text:span><text:span text:style-name="Source_20_Text"><text:span text:style-name="T182">al</text:span></text:span><text:span text:style-name="Source_20_Text"><text:span text:style-name="T183">u</text:span></text:span><text:span text:style-name="Source_20_Text"><text:span text:style-name="T183">e</text:span></text:span><text:span text:style-name="Source_20_Text"><text:span text:style-name="T181">1</text:span></text:span><text:span text:style-name="Source_20_Text"><text:span text:style-name="T10">,</text:span></text:span><text:span text:style-name="Source_20_Text"><text:span text:style-name="T181">v</text:span></text:span><text:span text:style-name="Source_20_Text"><text:span text:style-name="T182">al</text:span></text:span><text:span text:style-name="Source_20_Text"><text:span text:style-name="T183">u</text:span></text:span><text:span text:style-name="Source_20_Text"><text:span text:style-name="T183">e</text:span></text:span><text:span text:style-name="Source_20_Text"><text:span text:style-name="T181">2</text:span></text:span><text:span text:style-name="Source_20_Text"><text:span text:style-name="T10">,Contructor);</text:span></text:span></text:p>
            <text:p text:style-name="P64"><text:span text:style-name="Source_20_Text"><text:span text:style-name="T176">isDeepStrictEqual(v</text:span></text:span><text:span text:style-name="Source_20_Text"><text:span text:style-name="T184">al</text:span></text:span><text:span text:style-name="Source_20_Text"><text:span text:style-name="T185">ue</text:span></text:span><text:span text:style-name="Source_20_Text"><text:span text:style-name="T176">1,v</text:span></text:span><text:span text:style-name="Source_20_Text"><text:span text:style-name="T184">al</text:span></text:span><text:span text:style-name="Source_20_Text"><text:span text:style-name="T185">ue</text:span></text:span><text:span text:style-name="Source_20_Text"><text:span text:style-name="T176">2);</text:span></text:span></text:p>
            <text:p text:style-name="P65"><text:span text:style-name="Source_20_Text"><text:span text:style-name="T176">isCoercedObject</text:span></text:span><text:span text:style-name="Source_20_Text"><text:span text:style-name="T186">(object);</text:span></text:span></text:p>
            <text:p text:style-name="P66"><text:span text:style-name="Source_20_Text"><text:span text:style-name="T186">isTypedArray(value);</text:span></text:span></text:p>
            <text:p text:style-name="P65"><text:span text:style-name="Source_20_Text"><text:span text:style-name="T186">isArraylike(value);</text:span></text:span></text:p>
            <text:p text:style-name="P65"><text:span text:style-name="Source_20_Text"><text:span text:style-name="T157">toSafeString</text:span></text:span><text:span text:style-name="Source_20_Text"><text:span text:style-name="T30">(value);</text:span></text:span></text:p>
          </table:table-cell>
          <table:covered-table-cell/>
        </table:table-row>
        <table:table-row>
          <table:covered-table-cell table:style-name="Table4.A3"/>
          <table:covered-table-cell table:style-name="Table4.B3"/>
          <table:table-cell table:style-name="Table4.C7" table:number-columns-spanned="2" office:value-type="string">
            <text:p text:style-name="P64"><text:span text:style-name="Source_20_Text"><text:span text:style-name="T10">isNull(v</text:span></text:span><text:span text:style-name="Source_20_Text"><text:span text:style-name="T187">a</text:span></text:span><text:span text:style-name="Source_20_Text"><text:span text:style-name="T188">lue</text:span></text:span><text:span text:style-name="Source_20_Text"><text:span text:style-name="T10">);</text:span></text:span></text:p>
            <text:p text:style-name="P64"><text:span text:style-name="Source_20_Text"><text:span text:style-name="T10">isUndefined(v</text:span></text:span><text:span text:style-name="Source_20_Text"><text:span text:style-name="T189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64"><text:span text:style-name="Source_20_Text"><text:span text:style-name="T10">isN</text:span></text:span><text:span text:style-name="Source_20_Text"><text:span text:style-name="T190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57">isPlainObject(value);</text:span></text:span></text:p>
            <text:p text:style-name="P64"><text:span text:style-name="Source_20_Text"><text:span text:style-name="T191">isProxy(value);</text:span></text:span></text:p>
            <text:p text:style-name="P64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91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91">);</text:span></text:span></text:p>
          </table:table-cell>
          <table:covered-table-cell/>
        </table:table-row>
        <table:table-row>
          <table:covered-table-cell table:style-name="Table4.A3"/>
          <table:covered-table-cell table:style-name="Table4.B3"/>
          <table:table-cell table:style-name="Table4.C9" table:number-columns-spanned="2" office:value-type="string">
            <text:p text:style-name="P67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92">ue</text:span></text:span><text:span text:style-name="Source_20_Text"><text:span text:style-name="T10">);</text:span></text:span></text:p>
            <text:p text:style-name="P67"><text:span text:style-name="Source_20_Text"><text:span text:style-name="T10">isGenerator</text:span></text:span><text:span text:style-name="Source_20_Text"><text:span text:style-name="T193">F</text:span></text:span><text:span text:style-name="Source_20_Text"><text:span text:style-name="T194">u</text:span></text:span><text:span text:style-name="Source_20_Text"><text:span text:style-name="T193">n</text:span></text:span><text:span text:style-name="Source_20_Text"><text:span text:style-name="T194">ction</text:span></text:span><text:span text:style-name="Source_20_Text"><text:span text:style-name="T10">(v</text:span></text:span><text:span text:style-name="Source_20_Text"><text:span text:style-name="T195">a</text:span></text:span><text:span text:style-name="Source_20_Text"><text:span text:style-name="T196">lue</text:span></text:span><text:span text:style-name="Source_20_Text"><text:span text:style-name="T10">);</text:span></text:span></text:p>
            <text:p text:style-name="P67"><text:span text:style-name="Source_20_Text"><text:span text:style-name="T10">isAsync</text:span></text:span><text:span text:style-name="Source_20_Text"><text:span text:style-name="T193">F</text:span></text:span><text:span text:style-name="Source_20_Text"><text:span text:style-name="T194">u</text:span></text:span><text:span text:style-name="Source_20_Text"><text:span text:style-name="T193">n</text:span></text:span><text:span text:style-name="Source_20_Text"><text:span text:style-name="T194">ction</text:span></text:span><text:span text:style-name="Source_20_Text"><text:span text:style-name="T10">(v</text:span></text:span><text:span text:style-name="Source_20_Text"><text:span text:style-name="T195">a</text:span></text:span><text:span text:style-name="Source_20_Text"><text:span text:style-name="T196">lue</text:span></text:span><text:span text:style-name="Source_20_Text"><text:span text:style-name="T10">);</text:span></text:span></text:p>
            <text:p text:style-name="P67"><text:span text:style-name="Source_20_Text"><text:span text:style-name="T191">isAsyncGenerator</text:span></text:span><text:span text:style-name="Source_20_Text"><text:span text:style-name="T193">F</text:span></text:span><text:span text:style-name="Source_20_Text"><text:span text:style-name="T194">u</text:span></text:span><text:span text:style-name="Source_20_Text"><text:span text:style-name="T193">n</text:span></text:span><text:span text:style-name="Source_20_Text"><text:span text:style-name="T194">ction</text:span></text:span><text:span text:style-name="Source_20_Text"><text:span text:style-name="T191">(v</text:span></text:span><text:span text:style-name="Source_20_Text"><text:span text:style-name="T195">a</text:span></text:span><text:span text:style-name="Source_20_Text"><text:span text:style-name="T196">lue</text:span></text:span><text:span text:style-name="Source_20_Text"><text:span text:style-name="T191">);</text:span></text:span></text:p>
            <text:p text:style-name="P67"><text:span text:style-name="Source_20_Text"><text:span text:style-name="T197">isArrow</text:span></text:span><text:span text:style-name="Source_20_Text"><text:span text:style-name="T198">F</text:span></text:span><text:span text:style-name="Source_20_Text"><text:span text:style-name="T199">u</text:span></text:span><text:span text:style-name="Source_20_Text"><text:span text:style-name="T198">n</text:span></text:span><text:span text:style-name="Source_20_Text"><text:span text:style-name="T199">ction</text:span></text:span><text:span text:style-name="Source_20_Text"><text:span text:style-name="T197">(</text:span></text:span><text:span text:style-name="Source_20_Text"><text:span text:style-name="T200">value</text:span></text:span><text:span text:style-name="Source_20_Text"><text:span text:style-name="T197">);</text:span></text:span></text:p>
          </table:table-cell>
          <table:covered-table-cell/>
        </table:table-row>
        <table:table-row>
          <table:covered-table-cell table:style-name="Table4.A3"/>
          <table:covered-table-cell table:style-name="Table4.B3"/>
          <table:table-cell table:style-name="Table4.C10" office:value-type="string">
            <text:p text:style-name="P68"><text:span text:style-name="Source_20_Text"><text:span text:style-name="T57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7">isNonNullablePrimitive(value);</text:span></text:span></text:p>
          </table:table-cell>
        </table:table-row>
        <table:table-row>
          <table:covered-table-cell table:style-name="Table4.A3"/>
          <table:covered-table-cell table:style-name="Table4.B3"/>
          <table:table-cell table:style-name="Table4.C10" office:value-type="string">
            <text:p text:style-name="P69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201">l</text:span></text:span><text:span text:style-name="Source_20_Text"><text:span text:style-name="T202">ue</text:span></text:span><text:span text:style-name="Source_20_Text"><text:span text:style-name="T10">);</text:span></text:span></text:p>
          </table:table-cell>
          <table:table-cell table:style-name="Table4.D10" office:value-type="string">
            <text:p text:style-name="P69"><text:span text:style-name="Source_20_Text"><text:span text:style-name="T10">isAsyncItera</text:span></text:span><text:span text:style-name="Source_20_Text"><text:span text:style-name="T203">tor</text:span></text:span><text:span text:style-name="Source_20_Text"><text:span text:style-name="T10">(</text:span></text:span><text:span text:style-name="Source_20_Text"><text:span text:style-name="T174">value</text:span></text:span><text:span text:style-name="Source_20_Text"><text:span text:style-name="T10">);</text:span></text:span></text:p>
          </table:table-cell>
        </table:table-row>
        <table:table-row>
          <table:covered-table-cell table:style-name="Table4.A12"/>
          <table:covered-table-cell table:style-name="Table4.B12"/>
          <table:table-cell table:style-name="Table4.C12" office:value-type="string">
            <text:p text:style-name="P69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201">l</text:span></text:span><text:span text:style-name="Source_20_Text"><text:span text:style-name="T202">ue</text:span></text:span><text:span text:style-name="Source_20_Text"><text:span text:style-name="T10">);</text:span></text:span></text:p>
          </table:table-cell>
          <table:table-cell table:style-name="Table4.D12" office:value-type="string">
            <text:p text:style-name="P69"><text:span text:style-name="Source_20_Text"><text:span text:style-name="T10">isAsyncIterable(</text:span></text:span><text:span text:style-name="Source_20_Text"><text:span text:style-name="T174">value</text:span></text:span><text:span text:style-name="Source_20_Text"><text:span text:style-name="T10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4">Celestra for </text:span><text:span text:style-name="T205">browser</text:span><text:span text:style-name="T204">: </text:span><text:span text:style-name="T206">celestra.</text:span><text:span text:style-name="T207">browser</text:span><text:span text:style-name="T208">.</text:span><text:span text:style-name="T206">js</text:span></text:p>
          </table:table-cell>
          <table:table-cell table:style-name="Table8.B2" table:number-columns-spanned="2" office:value-type="string">
            <text:p text:style-name="P73"><text:span text:style-name="T204">Celestra for Node.js </text:span><text:span text:style-name="T209">and Deno</text:span><text:span text:style-name="T204">: </text:span><text:span text:style-name="T210">celestra.</text:span><text:span text:style-name="T208">node.</text:span><text:span text:style-name="T210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4"/>
            <text:p text:style-name="P75">&lt;script type="module"&gt;</text:p>
            <text:p text:style-name="P76">// import the defaultExport object</text:p>
            <text:p text:style-name="P77">import defaultExport from "./celestra.browser.js";</text:p>
            <text:p text:style-name="P77">globalThis.celestra = defaultExport;</text:p>
            <text:p text:style-name="P77">globalThis.CEL = defaultExport;</text:p>
            <text:p text:style-name="P75">&lt;/script&gt;</text:p>
            <text:p text:style-name="P77"/>
            <text:p text:style-name="P75">&lt;script type="module"&gt;</text:p>
            <text:p text:style-name="P76">// import with default with name</text:p>
            <text:p text:style-name="P77">import { default as celestra }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all into a new celestra object</text:p>
            <text:p text:style-name="P77">import * as celestra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some functions</text:p>
            <text:p text:style-name="P77">import { first, <text:span text:style-name="T211">map</text:span> } from "./celestra.browser.js";</text:p>
            <text:p text:style-name="P77">globalThis.first = first;</text:p>
            <text:p text:style-name="P77">globalThis.<text:span text:style-name="T211">map</text:span> = <text:span text:style-name="T211">map</text:span>;</text:p>
            <text:p text:style-name="P75">&lt;/script&gt;</text:p>
            <text:p text:style-name="P75"/>
            <text:p text:style-name="P75">&lt;script type="module"&gt;</text:p>
            <text:p text:style-name="P77">// dynamic import</text:p>
            <text:p text:style-name="P77">const celestra = await import("./celestra.browser.js");</text:p>
            <text:p text:style-name="P77">globalThis.celestra = celestra;</text:p>
            <text:p text:style-name="P77">globalThis.CEL = celestra;</text:p>
            <text:p text:style-name="P75">&lt;/script&gt;</text:p>
            <text:p text:style-name="P75"/>
          </table:table-cell>
          <table:table-cell table:style-name="Table8.B3" table:number-columns-spanned="2" office:value-type="string">
            <text:p text:style-name="P78"/>
            <text:p text:style-name="P78">// import the defaultExport object</text:p>
            <text:p text:style-name="P79"/>
            <text:p text:style-name="P79">import defaultExport from "./celestra.<text:span text:style-name="T212">node</text:span>.js";</text:p>
            <text:p text:style-name="P79">globalThis.celestra = defaultExport;</text:p>
            <text:p text:style-name="P79">globalThis.CEL = defaultExport;</text:p>
            <text:p text:style-name="P79"/>
            <text:p text:style-name="P78">// import with default with name</text:p>
            <text:p text:style-name="P79"/>
            <text:p text:style-name="P79">import { default as celestra }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all into a new celestra object</text:p>
            <text:p text:style-name="P79"/>
            <text:p text:style-name="P79">import * as celestra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some functions</text:p>
            <text:p text:style-name="P79"/>
            <text:p text:style-name="P79">import { first, <text:span text:style-name="T211">map</text:span> } from "./celestra.<text:span text:style-name="T212">node</text:span>.js";</text:p>
            <text:p text:style-name="P79">globalThis.first = first;</text:p>
            <text:p text:style-name="P80"><text:span text:style-name="Source_20_Text"><text:span text:style-name="T213">globalThis.</text:span></text:span><text:span text:style-name="Source_20_Text"><text:span text:style-name="T214">map</text:span></text:span><text:span text:style-name="Source_20_Text"><text:span text:style-name="T213"> = </text:span></text:span><text:span text:style-name="Source_20_Text"><text:span text:style-name="T214">map</text:span></text:span><text:span text:style-name="Source_20_Text"><text:span text:style-name="T213">;<text:line-break/><text:line-break/></text:span></text:span><text:span text:style-name="Source_20_Text"><text:span text:style-name="T215">// </text:span></text:span><text:span text:style-name="Source_20_Text"><text:span text:style-name="T216">dynamic import</text:span></text:span><text:span text:style-name="Source_20_Text"><text:span text:style-name="T213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1">Removed <text:span text:style-name="T217">APIs</text:span> in the <text:span text:style-name="T210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2">DOM API</text:p>
          </table:table-cell>
          <table:table-cell table:style-name="Table8.C5" office:value-type="string">
            <text:p text:style-name="P83"><text:span text:style-name="Source_20_Text"><text:span text:style-name="T218">Cookie API</text:span></text:span></text:p>
          </table:table-cell>
        </table:table-row>
      </table:table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5"><text:span text:style-name="T219">v</text:span>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7">Array.from();</text:p>
            <text:p text:style-name="P87">Array.of();</text:p>
            <text:p text:style-name="P87">Array.prototype.copyWithin();</text:p>
            <text:p text:style-name="P87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7">String.fromCodePoint();</text:p>
            <text:p text:style-name="P87">String.prototype.codePointAt();</text:p>
            <text:p text:style-name="P87">String.prototype.endsWith();</text:p>
            <text:p text:style-name="P87">String.prototype.startsWith();</text:p>
            <text:p text:style-name="P87">Math.acosh();</text:p>
            <text:p text:style-name="P87">Math.asinh();</text:p>
            <text:p text:style-name="P87">Math.atanh();</text:p>
            <text:p text:style-name="P87">Math.cbrt();</text:p>
            <text:p text:style-name="P87">Math.clz32();</text:p>
            <text:p text:style-name="P87">Math.cosh();</text:p>
            <text:p text:style-name="P87">Math.expm1();</text:p>
            <text:p text:style-name="P87">Math.fround();</text:p>
            <text:p text:style-name="P87">Math.hypot();</text:p>
            <text:p text:style-name="P87">Math.imul();</text:p>
            <text:p text:style-name="P87">Math.log1p();</text:p>
            <text:p text:style-name="P87">Math.log10();</text:p>
            <text:p text:style-name="P87">Math.log2();</text:p>
            <text:p text:style-name="P87">Math.sign();</text:p>
            <text:p text:style-name="P87">Math.sinh();</text:p>
            <text:p text:style-name="P87">Math.tanh();</text:p>
            <text:p text:style-name="P87">Math.trunc();</text:p>
            <text:p text:style-name="P87">Number.EPSILON;</text:p>
            <text:p text:style-name="P87">Number.isNaN();</text:p>
            <text:p text:style-name="P87">isNaN();</text:p>
            <text:p text:style-name="P87">Number.isInteger();</text:p>
            <text:p text:style-name="P87">Number.isFinite();</text:p>
            <text:p text:style-name="P87">Number.isSafeInteger();</text:p>
            <text:p text:style-name="P87">Number.parseInt();</text:p>
            <text:p text:style-name="P87">Number.parseFloat();</text:p>
          </table:table-cell>
          <table:table-cell table:style-name="Table3.B3" table:number-rows-spanned="5" office:value-type="string">
            <text:p text:style-name="P88"><text:span text:style-name="Source_20_Text"><text:span text:style-name="T146"/></text:span></text:p>
            <text:p text:style-name="P88"><text:span text:style-name="Source_20_Text"><text:span text:style-name="T220">Array.prototype.values();</text:span></text:span></text:p>
            <text:p text:style-name="P88"><text:span text:style-name="Source_20_Text"><text:span text:style-name="T220">Array.prototype.includ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ChildNode.after();</text:span></text:span><text:span text:style-name="T221"><text:line-break/></text:span><text:span text:style-name="Source_20_Text"><text:span text:style-name="T220">ChildNode.before();</text:span></text:span><text:span text:style-name="T221"><text:line-break/></text:span><text:span text:style-name="Source_20_Text"><text:span text:style-name="T220">ChildNode.remove();</text:span></text:span><text:span text:style-name="T221"><text:line-break/></text:span><text:span text:style-name="Source_20_Text"><text:span text:style-name="T220">ChildNode.replaceWit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Element.prototype.closest();<text:line-break/>Element.prototype.getAttributeNames();</text:span></text:span></text:p>
            <text:p text:style-name="P88"><text:span text:style-name="Source_20_Text"><text:span text:style-name="T220">Element.prototype.matches();</text:span></text:span></text:p>
            <text:p text:style-name="P88"><text:span text:style-name="Source_20_Text"><text:span text:style-name="T220">Element.prototype.toggleAttribute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ParentNode.append();</text:span></text:span></text:p>
            <text:p text:style-name="P89"><text:span text:style-name="Source_20_Text"><text:span text:style-name="T220">ParentNode.prepend();</text:span></text:span><text:span text:style-name="T221"><text:line-break/></text:span></text:p>
            <text:p text:style-name="P89"><text:span text:style-name="Source_20_Text"><text:span text:style-name="T220">String.prototype[Symbol.iterator]();</text:span></text:span></text:p>
            <text:p text:style-name="P88"><text:span text:style-name="Source_20_Text"><text:span text:style-name="T220">String.prototype.includes();</text:span></text:span></text:p>
            <text:p text:style-name="P88"><text:span text:style-name="Source_20_Text"><text:span text:style-name="T220">String.prototype.repeat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NodeList.prototype.forEac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Object.assign();</text:span></text:span></text:p>
            <text:p text:style-name="P88"><text:span text:style-name="Source_20_Text"><text:span text:style-name="T220">Object.entries();</text:span></text:span></text:p>
            <text:p text:style-name="P90"><text:span text:style-name="Source_20_Text"><text:span text:style-name="T220">Object.getOwnPropertyDescriptors();</text:span></text:span></text:p>
            <text:p text:style-name="P90"><text:span text:style-name="Source_20_Text"><text:span text:style-name="T220">Object.valu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0">RegExp.prototype.flags;</text:span></text:span></text:p>
            <text:p text:style-name="P88"><text:span text:style-name="Source_20_Text"><text:span text:style-name="T146"/></text:span></text:p>
            <text:p text:style-name="P91"><text:span text:style-name="Source_20_Text"><text:span text:style-name="T222">window</text:span></text:span><text:span text:style-name="Source_20_Text"><text:span text:style-name="T220">.screenLeft;</text:span></text:span></text:p>
            <text:p text:style-name="P91"><text:span text:style-name="Source_20_Text"><text:span text:style-name="T222">window</text:span></text:span><text:span text:style-name="Source_20_Text"><text:span text:style-name="T220">.screenTop;</text:span></text:span></text:p>
          </table:table-cell>
          <table:table-cell table:style-name="Table3.C3" office:value-type="string">
            <text:p text:style-name="P92">Array.prototype.at();</text:p>
            <text:p text:style-name="P92">Array.prototype.findLast();</text:p>
            <text:p text:style-name="P92">Array.prototype.findLastIndex();</text:p>
            <text:p text:style-name="P92">Array.prototype.flat();</text:p>
            <text:p text:style-name="P92">Array.prototype.flatMap();</text:p>
            <text:p text:style-name="P92">Number.MIN_SAFE_INTEGER;</text:p>
            <text:p text:style-name="P92">Number.MAX_SAFE_INTEGER;</text:p>
            <text:p text:style-name="P92">Object.fromEntries();</text:p>
            <text:p text:style-name="P92">Object.is();</text:p>
            <text:p text:style-name="P92">String.prototype.at();</text:p>
            <text:p text:style-name="P92">String.prototype.matchAll();</text:p>
            <text:p text:style-name="P92">String.prototype.padStart();</text:p>
            <text:p text:style-name="P92">String.prototype.padEnd();</text:p>
            <text:p text:style-name="P92">String.prototype.replaceAll();</text:p>
            <text:p text:style-name="P92">String.prototype.trimStart();</text:p>
            <text:p text:style-name="P92">String.prototype.trimLeft();</text:p>
            <text:p text:style-name="P92">String.prototype.trimEnd();</text:p>
            <text:p text:style-name="P92">String.prototype.trimRight();</text:p>
            <text:p text:style-name="P92">Typedarray.prototype.at();</text:p>
            <text:p text:style-name="P92">TypedArray.prototype.findLast();</text:p>
            <text:p text:style-name="P92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6">v5.<text:span text:style-name="T223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2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3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4">Map.groupBy(); <text:span text:style-name="T224">and </text:span>Object.groupBy();</text:p>
            <text:p text:style-name="P94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05T23:17:14.175666000</dc:date>
    <meta:print-date>2026-06-05T23:17:19.709858000</meta:print-date>
    <meta:editing-cycles>1336</meta:editing-cycles>
    <meta:editing-duration>P1DT17H16M52S</meta:editing-duration>
    <meta:printed-by>PDF files</meta:printed-by>
    <meta:document-statistic meta:table-count="5" meta:image-count="0" meta:object-count="0" meta:page-count="5" meta:paragraph-count="382" meta:word-count="613" meta:character-count="9679" meta:non-whitespace-character-count="9440"/>
    <meta:template xlink:type="simple" xlink:actuate="onRequest" xlink:title="" xlink:href="Normal.dotm"/>
  </office:meta>
</office:document-meta>
</file>